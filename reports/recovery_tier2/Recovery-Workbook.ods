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meta="urn:oasis:names:tc:opendocument:xmlns:meta:1.0" office:version="1.2">
  <office:automatic-styles>
    <!-- Section header -->
    <style:style style:name="ce_section" style:family="table-cell">
      <style:text-properties fo:font-weight="bold" fo:font-size="10pt" fo:color="#1F3864" fo:background-color="#D6E4F0"/>
      <style:table-cell-properties fo:background-color="#D6E4F0" fo:padding="2pt"/>
    </style:style>
    <!-- Sheet title -->
    <style:style style:name="ce_title" style:family="table-cell">
      <style:text-properties fo:font-weight="bold" fo:font-size="12pt" fo:color="#1F3864"/>
    </style:style>
    <!-- Label column -->
    <style:style style:name="ce_label" style:family="table-cell">
      <style:text-properties fo:font-weight="bold" fo:font-size="10pt"/>
    </style:style>
    <!-- AUTO field value -->
    <style:style style:name="ce_auto" style:family="table-cell">
      <style:text-properties fo:font-size="10pt" fo:color="#1A5276"/>
      <style:table-cell-properties fo:background-color="#EBF5FB"/>
    </style:style>
    <!-- DERIVED field value -->
    <style:style style:name="ce_derived" style:family="table-cell">
      <style:text-properties fo:font-size="10pt" fo:color="#145A32"/>
      <style:table-cell-properties fo:background-color="#EAFAF1"/>
    </style:style>
    <!-- HUMAN field value (blank, highlighted for input) -->
    <style:style style:name="ce_human" style:family="table-cell">
      <style:text-properties fo:font-size="10pt" fo:color="#7D6608"/>
      <style:table-cell-properties fo:background-color="#FEFDE7" style:cell-protect="formula-hidden"/>
    </style:style>
    <!-- UNRESOLVED field value -->
    <style:style style:name="ce_unresolved" style:family="table-cell">
      <style:text-properties fo:font-size="10pt" fo:color="#78281F"/>
      <style:table-cell-properties fo:background-color="#FDEDEC"/>
    </style:style>
    <!-- Rationale / note text -->
    <style:style style:name="ce_note" style:family="table-cell">
      <style:text-properties fo:font-size="9pt" fo:color="#555555" fo:font-style="italic"/>
    </style:style>
    <!-- Checkbox placeholder -->
    <style:style style:name="ce_checkbox" style:family="table-cell">
      <style:text-properties fo:font-size="10pt"/>
      <style:table-cell-properties fo:background-color="#FFF9C4"/>
    </style:style>
    <!-- Column width styles -->
    <style:style style:name="co_label" style:family="table-column">
      <style:table-column-properties style:column-width="5.5cm"/>
    </style:style>
    <style:style style:name="co_value" style:family="table-column">
      <style:table-column-properties style:column-width="9cm"/>
    </style:style>
    <style:style style:name="co_note" style:family="table-column">
      <style:table-column-properties style:column-width="10cm"/>
    </style:style>
    <style:style style:name="co_class" style:family="table-column">
      <style:table-column-properties style:column-width="2.5cm"/>
    </style:style>
    <!-- Row height for section headers -->
    <style:style style:name="ro_section" style:family="table-row">
      <style:table-row-properties style:row-height="0.7cm" fo:background-color="#D6E4F0"/>
    </style:style>
    <style:style style:name="ro_normal" style:family="table-row">
      <style:table-row-properties style:row-height="0.55cm"/>
    </style:style>
  </office:automatic-styles>
  <office:body>
    <office:spreadsheet>
      <table:table table:name="Infrastructure Overview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— pve01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Host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Assessment: 2026-05-29T02:05:00Z</text:p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enerated</text:p>
          </table:table-cell>
          <table:table-cell table:style-name="ce_auto" office:value-type="string" fo:wrap-option="wrap">
            <text:p>2026-05-31T03:22:45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PU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gical CPUs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ocket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Mem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vailable</text:p>
          </table:table-cell>
          <table:table-cell table:style-name="ce_auto" office:value-type="string" fo:wrap-option="wrap">
            <text:p>18.3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ZFS Pools</text:p>
          </table:table-cell>
          <table:table-cell table:style-name="ce_auto" office:value-type="string" fo:wrap-option="wrap">
            <text:p>rpool: state=ONLINE  topology=mirror  free=412.8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 Storage</text:p>
          </table:table-cell>
          <table:table-cell table:style-name="ce_auto" office:value-type="string" fo:wrap-option="wrap">
            <text:p>local (dir): total=50.0 GB  free=44.1 GB
local-zfs (zfspool): total=412.8 GB  free=160.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irtual Machin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s</text:p>
          </table:table-cell>
          <table:table-cell table:style-name="ce_auto" office:value-type="string" fo:wrap-option="wrap">
            <text:p>VM 100 (infra-bootstrap): running  cores=4  mem=8192 MB
VM 101 (forgejo): running  cores=2  mem=4096 MB
VM 102 (inventory): running  cores=2  mem=2048 MB
VM 103 (assessment-engine): running  cores=2  mem=4096 M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4 VM(s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Overall Readines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style-name="ce_label" office:value-type="string">
            <text:p>Single Points of Failure</text:p>
          </table:table-cell>
          <table:table-cell table:style-name="ce_derived" office:value-type="string" fo:wrap-option="wrap">
            <text:p>pve01 (Proxmox 8.2-1)
rpool (ZFS mirror, 412.8 GB free)
vmbr0 (bridge, 192.168.1.10/24)
forgejo (VM 101)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covery Blocker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store Sequence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store Sequence (Generated from Dependency Graph)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style-name="ce_label" office:value-type="string">
            <text:p>Total Estimated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Sum of per-wave estimates — actual time varies</text:p>
          </table:table-cell>
        </table:table-row>
        <table:table-row table:style-name="ro_normal">
          <table:table-cell table:style-name="ce_label" office:value-type="string">
            <text:p>Total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1 — Physical host — must be restored firs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9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No prerequisites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2 — Storage layer — must be available before VMs can start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5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3 — Restore 2 component(s) — no mutual dependenci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4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4 — Restore: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Wave 5 — Restore: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Estimated Time</text:p>
          </table:table-cell>
          <table:table-cell table:style-name="ce_derived" office:value-type="string" fo:wrap-option="wrap">
            <text:p>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Depends on: pve01 (Proxmox 8.2-1), rpool (ZFS mirror, 412.8 GB free), vmbr0 (bridge, 192.168.1.10/24), forgejo (VM 101), inventory (VM 102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Component Detail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Component Recovery Details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pve01 (Proxmox 8.2-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host:pve01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host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Kernel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Hostname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pve01 (Proxmox 8.2-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pool (ZFS mirror, 412.8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ol Name</text:p>
          </table:table-cell>
          <table:table-cell table:style-name="ce_auto" office:value-type="string" fo:wrap-option="wrap">
            <text:p>r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pology</text:p>
          </table:table-cell>
          <table:table-cell table:style-name="ce_auto" office:value-type="string" fo:wrap-option="wrap">
            <text:p>mirro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916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e</text:p>
          </table:table-cell>
          <table:table-cell table:style-name="ce_auto" office:value-type="string" fo:wrap-option="wrap">
            <text:p>ONL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vices</text:p>
          </table:table-cell>
          <table:table-cell table:style-name="ce_auto" office:value-type="string" fo:wrap-option="wrap">
            <text:p>['sda', 'sdb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rpool (ZFS mirror, 412.8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 (dir, 44.1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dir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50.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44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 (dir, 44.1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local-zfs (zfspool, 160.4 GB free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storag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Name</text:p>
          </table:table-cell>
          <table:table-cell table:style-name="ce_auto" office:value-type="string" fo:wrap-option="wrap">
            <text:p>local-zf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orage Type</text:p>
          </table:table-cell>
          <table:table-cell table:style-name="ce_auto" office:value-type="string" fo:wrap-option="wrap">
            <text:p>zfspoo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Gb</text:p>
          </table:table-cell>
          <table:table-cell table:style-name="ce_auto" office:value-type="string" fo:wrap-option="wrap">
            <text:p>412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Free Gb</text:p>
          </table:table-cell>
          <table:table-cell table:style-name="ce_auto" office:value-type="string" fo:wrap-option="wrap">
            <text:p>160.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ctive</text:p>
          </table:table-cell>
          <table:table-cell table:style-name="ce_auto" office:value-type="string" fo:wrap-option="wrap">
            <text:p>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local-zfs (zfspool, 160.4 GB free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mbr0 (bridge, 192.168.1.10/2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networ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ridge Name</text:p>
          </table:table-cell>
          <table:table-cell table:style-name="ce_auto" office:value-type="string" fo:wrap-option="wrap">
            <text:p>vmbr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orts</text:p>
          </table:table-cell>
          <table:table-cell table:style-name="ce_auto" office:value-type="string" fo:wrap-option="wrap">
            <text:p>['enp2s0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ddresses</text:p>
          </table:table-cell>
          <table:table-cell table:style-name="ce_auto" office:value-type="string" fo:wrap-option="wrap">
            <text:p>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lan Aware</text:p>
          </table:table-cell>
          <table:table-cell table:style-name="ce_auto" office:value-type="string" fo:wrap-option="wrap">
            <text:p>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unresolved" office:value-type="string" fo:wrap-option="wrap">
            <text:p>Unknown (Tier 1 assessment)</text:p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>Run Tier 2 assessment to collect backup inventory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vmbr0 (bridge, 192.168.1.10/24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fra-bootstrap (VM 100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2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fra-bootstrap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819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2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fra-bootstrap (VM 100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forgejo (VM 101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forgej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1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9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Run manual backup or verify schedule</text:p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forgejo (VM 101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inventory (VM 102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✓ GREEN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>Backup present (1d old, restore tested), all checks passed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invento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20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3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inventory (VM 102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assessment-engine (VM 103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adiness Score</text:p>
          </table:table-cell>
          <table:table-cell table:style-name="Default" office:value-type="string" fo:wrap-option="wrap">
            <text:p>⚠ YELLOW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store procedure never tested for vm:assessment-engine</text:p>
          </table:table-cell>
        </table:table-row>
        <table:table-row table:style-name="ro_normal">
          <table:table-cell table:style-name="ce_label" office:value-type="string">
            <text:p>Type</text:p>
          </table:table-cell>
          <table:table-cell table:style-name="ce_auto" office:value-type="string" fo:wrap-option="wrap">
            <text:p>vm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mid</text:p>
          </table:table-cell>
          <table:table-cell table:style-name="ce_auto" office:value-type="string" fo:wrap-option="wrap">
            <text:p>103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ame</text:p>
          </table:table-cell>
          <table:table-cell table:style-name="ce_auto" office:value-type="string" fo:wrap-option="wrap">
            <text:p>assessment-engin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tatus</text:p>
          </table:table-cell>
          <table:table-cell table:style-name="ce_auto" office:value-type="string" fo:wrap-option="wrap">
            <text:p>running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emory Mb</text:p>
          </table:table-cell>
          <table:table-cell table:style-name="ce_auto" office:value-type="string" fo:wrap-option="wrap">
            <text:p>4096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isk Gb</text:p>
          </table:table-cell>
          <table:table-cell table:style-name="ce_auto" office:value-type="string" fo:wrap-option="wrap">
            <text:p>5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ackup</text:p>
          </table:table-cell>
          <table:table-cell table:style-name="ce_auto" office:value-type="string" fo:wrap-option="wrap">
            <text:p>Present (1 day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Tested</text:p>
          </table:table-cell>
          <table:table-cell table:style-name="ce_auto" office:value-type="string" fo:wrap-option="wrap">
            <text:p>No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GAP: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Remediation: Perform restore test to isolated environment</text:p>
          </table:table-cell>
        </table:table-row>
        <table:table-row table:style-name="ro_normal">
          <table:table-cell table:style-name="ce_label" office:value-type="string">
            <text:p>Restore notes / passphrase location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any recovery-specific notes for assessment-engine (VM 103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Recovery Readiness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Readiness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Overall Score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3 component(s) with minor gaps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omponent Scor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host:pve01</text:p>
          </table:table-cell>
          <table:table-cell/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 (dir, 44.1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local-zfs (zfspool, 160.4 GB free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), all checks passed</text:p>
          </table:table-cell>
          <table:table-cell/>
        </table:table-row>
        <table:table-row table:style-name="ro_normal">
          <table:table-cell table:style-name="ce_label" office:value-type="string">
            <text:p>infra-bootstrap (VM 100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2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Backup is 9 days old (threshold: 7 days for vm); Restore procedure never tested for vm:forgejo</text:p>
          </table:table-cell>
          <table:table-cell/>
        </table:table-row>
        <table:table-row table:style-name="ro_normal">
          <table:table-cell table:style-name="ce_label" office:value-type="string">
            <text:p>inventory (VM 102)</text:p>
          </table:table-cell>
          <table:table-cell table:style-name="ce_derived" office:value-type="string">
            <text:p>✓ GREEN</text:p>
          </table:table-cell>
          <table:table-cell table:style-name="ce_note" office:value-type="string" fo:wrap-option="wrap">
            <text:p>Backup present (1d old, restore tested), all checks passed</text:p>
          </table:table-cell>
          <table:table-cell/>
        </table:table-row>
        <table:table-row table:style-name="ro_normal">
          <table:table-cell table:style-name="ce_label" office:value-type="string">
            <text:p>assessment-engine (VM 103)</text:p>
          </table:table-cell>
          <table:table-cell table:style-name="ce_auto" office:value-type="string">
            <text:p>⚠ YELLOW</text:p>
          </table:table-cell>
          <table:table-cell table:style-name="ce_note" office:value-type="string" fo:wrap-option="wrap">
            <text:p>Restore procedure never tested for vm:assessment-engine</text:p>
          </table:table-cell>
          <table:table-cell/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aps Requiring Attention (4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 — UNTESTED_RESTORE</text:p>
          </table:table-cell>
          <table:table-cell table:style-name="Default" office:value-type="string" fo:wrap-option="wrap">
            <text:p>Restore procedure never tested for host:pve01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forgejo (VM 101) — STALE_BACKUP</text:p>
          </table:table-cell>
          <table:table-cell table:style-name="Default" office:value-type="string" fo:wrap-option="wrap">
            <text:p>Backup is 9 days old (threshold: 7 days for vm)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Run manual backup or verify schedule  |  Impact: Recovery point may not meet RPO</text:p>
          </table:table-cell>
        </table:table-row>
        <table:table-row table:style-name="ro_normal">
          <table:table-cell table:style-name="ce_label" office:value-type="string">
            <text:p>forgejo (VM 101) — UNTESTED_RESTORE</text:p>
          </table:table-cell>
          <table:table-cell table:style-name="Default" office:value-type="string" fo:wrap-option="wrap">
            <text:p>Restore procedure never tested for vm:forgejo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style-name="ce_label" office:value-type="string">
            <text:p>assessment-engine (VM 103) — UNTESTED_RESTORE</text:p>
          </table:table-cell>
          <table:table-cell table:style-name="Default" office:value-type="string" fo:wrap-option="wrap">
            <text:p>Restore procedure never tested for vm:assessment-engine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>Fix: Perform restore test to isolated environment  |  Impact: Restore procedure unvalidated; actual RTO unknown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ingle Points of Failur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pve01 (Proxmox 8.2-1)</text:p>
          </table:table-cell>
          <table:table-cell table:style-name="Default" office:value-type="string" fo:wrap-option="wrap">
            <text:p>8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rpool (ZFS mirror, 412.8 GB free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vmbr0 (bridge, 192.168.1.10/24)</text:p>
          </table:table-cell>
          <table:table-cell table:style-name="Default" office:value-type="string" fo:wrap-option="wrap">
            <text:p>4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style-name="ce_label" office:value-type="string">
            <text:p>forgejo (VM 101)</text:p>
          </table:table-cell>
          <table:table-cell table:style-name="Default" office:value-type="string" fo:wrap-option="wrap">
            <text:p>2 component(s) depend on this</text:p>
          </table:table-cell>
          <table:table-cell table:style-name="ce_label" office:value-type="string">
            <text:p>[ORANGE]</text:p>
          </table:table-cell>
          <table:table-cell table:style-name="ce_note" office:value-type="string" fo:wrap-option="wrap">
            <text:p>Consider adding redundancy or offsite backup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uman Input Required During Recove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Incident start ti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cord when recovery was initiated</text:p>
          </table:table-cell>
        </table:table-row>
        <table:table-row table:style-name="ro_normal">
          <table:table-cell table:style-name="ce_label" office:value-type="string">
            <text:p>Affected components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List components confirmed as failed</text:p>
          </table:table-cell>
        </table:table-row>
        <table:table-row table:style-name="ro_normal">
          <table:table-cell table:style-name="ce_label" office:value-type="string">
            <text:p>Recovery decision maker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Name of person authorising recovery</text:p>
          </table:table-cell>
        </table:table-row>
        <table:table-row table:style-name="ro_normal">
          <table:table-cell table:style-name="ce_label" office:value-type="string">
            <text:p>KeePass database available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KeePass database is accessible</text:p>
          </table:table-cell>
        </table:table-row>
        <table:table-row table:style-name="ro_normal">
          <table:table-cell table:style-name="ce_label" office:value-type="string">
            <text:p>Physical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Confirm physical host access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Generation Repor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Recovery Documentation Generation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eneration Metadata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enerated At</text:p>
          </table:table-cell>
          <table:table-cell table:style-name="ce_auto" office:value-type="string" fo:wrap-option="wrap">
            <text:p>2026-05-31T03:22:45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Mode</text:p>
          </table:table-cell>
          <table:table-cell table:style-name="ce_auto" office:value-type="string" fo:wrap-option="wrap">
            <text:p>recovery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Tier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29T02:05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raph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Nodes</text:p>
          </table:table-cell>
          <table:table-cell table:style-name="ce_derived" office:value-type="string" fo:wrap-option="wrap">
            <text:p>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dges</text:p>
          </table:table-cell>
          <table:table-cell table:style-name="ce_derived" office:value-type="string" fo:wrap-option="wrap">
            <text:p>19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Restore Waves</text:p>
          </table:table-cell>
          <table:table-cell table:style-name="ce_derived" office:value-type="string" fo:wrap-option="wrap">
            <text:p>5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Estimated Total Time</text:p>
          </table:table-cell>
          <table:table-cell table:style-name="ce_derived" office:value-type="string" fo:wrap-option="wrap">
            <text:p>220 minutes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Readiness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REEN</text:p>
          </table:table-cell>
          <table:table-cell table:style-name="Default" office:value-type="string" fo:wrap-option="wrap">
            <text:p>6</text:p>
          </table:table-cell>
          <table:table-cell table:style-name="ce_label" office:value-type="string">
            <text:p>[GREEN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YELLOW</text:p>
          </table:table-cell>
          <table:table-cell table:style-name="Default" office:value-type="string" fo:wrap-option="wrap">
            <text:p>3</text:p>
          </table:table-cell>
          <table:table-cell table:style-name="ce_label" office:value-type="string">
            <text:p>[YELLOW]</text:p>
          </table:table-cell>
          <table:table-cell table:style-name="ce_note" office:value-type="string" fo:wrap-option="wrap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able="urn:oasis:names:tc:opendocument:xmlns:table:1.0" office:version="1.2">
  <office:styles>
    <style:style style:name="Default" style:family="table-cell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