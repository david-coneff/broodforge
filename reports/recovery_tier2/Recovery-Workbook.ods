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meta="urn:oasis:names:tc:opendocument:xmlns:meta:1.0" office:version="1.2">
  <office:automatic-styles>
    <!-- Section header -->
    <style:style style:name="ce_section" style:family="table-cell">
      <style:text-properties fo:font-weight="bold" fo:font-size="10pt" fo:color="#1F3864" fo:background-color="#D6E4F0"/>
      <style:table-cell-properties fo:background-color="#D6E4F0" fo:padding="2pt"/>
    </style:style>
    <!-- Sheet title -->
    <style:style style:name="ce_title" style:family="table-cell">
      <style:text-properties fo:font-weight="bold" fo:font-size="12pt" fo:color="#1F3864"/>
    </style:style>
    <!-- Label column -->
    <style:style style:name="ce_label" style:family="table-cell">
      <style:text-properties fo:font-weight="bold" fo:font-size="10pt"/>
    </style:style>
    <!-- AUTO field value -->
    <style:style style:name="ce_auto" style:family="table-cell">
      <style:text-properties fo:font-size="10pt" fo:color="#1A5276"/>
      <style:table-cell-properties fo:background-color="#EBF5FB"/>
    </style:style>
    <!-- DERIVED field value -->
    <style:style style:name="ce_derived" style:family="table-cell">
      <style:text-properties fo:font-size="10pt" fo:color="#145A32"/>
      <style:table-cell-properties fo:background-color="#EAFAF1"/>
    </style:style>
    <!-- HUMAN field value (blank, highlighted for input) -->
    <style:style style:name="ce_human" style:family="table-cell">
      <style:text-properties fo:font-size="10pt" fo:color="#7D6608"/>
      <style:table-cell-properties fo:background-color="#FEFDE7" style:cell-protect="formula-hidden"/>
    </style:style>
    <!-- UNRESOLVED field value -->
    <style:style style:name="ce_unresolved" style:family="table-cell">
      <style:text-properties fo:font-size="10pt" fo:color="#78281F"/>
      <style:table-cell-properties fo:background-color="#FDEDEC"/>
    </style:style>
    <!-- Rationale / note text -->
    <style:style style:name="ce_note" style:family="table-cell">
      <style:text-properties fo:font-size="9pt" fo:color="#555555" fo:font-style="italic"/>
    </style:style>
    <!-- Checkbox placeholder -->
    <style:style style:name="ce_checkbox" style:family="table-cell">
      <style:text-properties fo:font-size="10pt"/>
      <style:table-cell-properties fo:background-color="#FFF9C4"/>
    </style:style>
    <!-- Column width styles -->
    <style:style style:name="co_label" style:family="table-column">
      <style:table-column-properties style:column-width="5.5cm"/>
    </style:style>
    <style:style style:name="co_value" style:family="table-column">
      <style:table-column-properties style:column-width="9cm"/>
    </style:style>
    <style:style style:name="co_note" style:family="table-column">
      <style:table-column-properties style:column-width="10cm"/>
    </style:style>
    <style:style style:name="co_class" style:family="table-column">
      <style:table-column-properties style:column-width="2.5cm"/>
    </style:style>
    <!-- Row height for section headers -->
    <style:style style:name="ro_section" style:family="table-row">
      <style:table-row-properties style:row-height="0.7cm" fo:background-color="#D6E4F0"/>
    </style:style>
    <style:style style:name="ro_normal" style:family="table-row">
      <style:table-row-properties style:row-height="0.55cm"/>
    </style:style>
  </office:automatic-styles>
  <office:body>
    <office:spreadsheet>
      <table:table table:name="Infrastructure Overview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Recovery Documentation — pve01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Host</text:p>
          </table:table-cell>
          <table:table-cell table:style-name="ce_auto" office:value-type="string" fo:wrap-option="wrap">
            <text:p>pve0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Assessment: 2026-05-29T02:05:00Z</text:p>
          </table:table-cell>
        </table:table-row>
        <table:table-row table:style-name="ro_normal">
          <table:table-cell table:style-name="ce_label" office:value-type="string">
            <text:p>Proxmox Version</text:p>
          </table:table-cell>
          <table:table-cell table:style-name="ce_auto" office:value-type="string" fo:wrap-option="wrap">
            <text:p>8.2-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Kernel</text:p>
          </table:table-cell>
          <table:table-cell table:style-name="ce_auto" office:value-type="string" fo:wrap-option="wrap">
            <text:p>6.8.4-2-pv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ssessment Date</text:p>
          </table:table-cell>
          <table:table-cell table:style-name="ce_auto" office:value-type="string" fo:wrap-option="wrap">
            <text:p>2026-05-29T02:05:00Z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Generated</text:p>
          </table:table-cell>
          <table:table-cell table:style-name="ce_auto" office:value-type="string" fo:wrap-option="wrap">
            <text:p>2026-05-31T13:26:26Z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CPU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Model</text:p>
          </table:table-cell>
          <table:table-cell table:style-name="ce_auto" office:value-type="string" fo:wrap-option="wrap">
            <text:p>Intel(R) Core(TM) i9-13900K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Logical CPUs</text:p>
          </table:table-cell>
          <table:table-cell table:style-name="ce_auto" office:value-type="string" fo:wrap-option="wrap">
            <text:p>4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ockets</text:p>
          </table:table-cell>
          <table:table-cell table:style-name="ce_auto" office:value-type="string" fo:wrap-option="wrap">
            <text:p>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Memo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Total RAM</text:p>
          </table:table-cell>
          <table:table-cell table:style-name="ce_auto" office:value-type="string" fo:wrap-option="wrap">
            <text:p>64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vailable</text:p>
          </table:table-cell>
          <table:table-cell table:style-name="ce_auto" office:value-type="string" fo:wrap-option="wrap">
            <text:p>18.3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Storage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ZFS Pools</text:p>
          </table:table-cell>
          <table:table-cell table:style-name="ce_auto" office:value-type="string" fo:wrap-option="wrap">
            <text:p>rpool: state=ONLINE  topology=mirror  free=412.8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PVE Storage</text:p>
          </table:table-cell>
          <table:table-cell table:style-name="ce_auto" office:value-type="string" fo:wrap-option="wrap">
            <text:p>local (dir): total=50.0 GB  free=44.1 GB
local-zfs (zfspool): total=412.8 GB  free=160.4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Network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Bridges</text:p>
          </table:table-cell>
          <table:table-cell table:style-name="ce_auto" office:value-type="string" fo:wrap-option="wrap">
            <text:p>vmbr0: ports=['enp2s0']  ['192.168.1.10/24']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efault Gateway</text:p>
          </table:table-cell>
          <table:table-cell table:style-name="ce_auto" office:value-type="string" fo:wrap-option="wrap">
            <text:p>192.168.1.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NS Servers</text:p>
          </table:table-cell>
          <table:table-cell table:style-name="ce_auto" office:value-type="string" fo:wrap-option="wrap">
            <text:p>1.1.1.1, 8.8.8.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Virtual Machine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VMs</text:p>
          </table:table-cell>
          <table:table-cell table:style-name="ce_auto" office:value-type="string" fo:wrap-option="wrap">
            <text:p>VM 100 (infra-bootstrap): running  cores=4  mem=8192 MB
VM 101 (forgejo): running  cores=2  mem=4096 MB
VM 102 (inventory): running  cores=2  mem=2048 MB
VM 103 (assessment-engine): running  cores=2  mem=4096 M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4 VM(s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Overall Readines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Overall Score</text:p>
          </table:table-cell>
          <table:table-cell table:style-name="ce_auto" office:value-type="string">
            <text:p>⚠ YELLOW</text:p>
          </table:table-cell>
          <table:table-cell table:style-name="ce_note" office:value-type="string" fo:wrap-option="wrap">
            <text:p>3 component(s) with minor gaps</text:p>
          </table:table-cell>
          <table:table-cell/>
        </table:table-row>
        <table:table-row table:style-name="ro_normal">
          <table:table-cell table:style-name="ce_label" office:value-type="string">
            <text:p>Single Points of Failure</text:p>
          </table:table-cell>
          <table:table-cell table:style-name="ce_derived" office:value-type="string" fo:wrap-option="wrap">
            <text:p>pve01 (Proxmox 8.2-1)
rpool (ZFS mirror, 412.8 GB free)
vmbr0 (bridge, 192.168.1.10/24)
forgejo (VM 101)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covery Blockers</text:p>
          </table:table-cell>
          <table:table-cell table:style-name="ce_auto" office:value-type="string" fo:wrap-option="wrap">
            <text:p>(none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CLASS LEGEND:</text:p>
          </table:table-cell>
          <table:table-cell table:style-name="ce_note" office:value-type="string">
            <text:p>[AUTO] From assessment  [DERIVED] Computed  [HUMAN] Operator input  [UNRESOLVED] Missing — see note</text:p>
          </table:table-cell>
          <table:table-cell table:style-name="Default" office:value-type="string">
            <text:p/>
          </table:table-cell>
          <table:table-cell table:style-name="Default" office:value-type="string">
            <text:p/>
          </table:table-cell>
        </table:table-row>
      </table:table>
      <table:table table:name="Restore Sequence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Restore Sequence (Generated from Dependency Graph)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Field</text:p>
          </table:table-cell>
          <table:table-cell table:style-name="ce_label" office:value-type="string">
            <text:p>Value</text:p>
          </table:table-cell>
          <table:table-cell table:style-name="ce_label" office:value-type="string">
            <text:p>Class</text:p>
          </table:table-cell>
          <table:table-cell table:style-name="ce_label" office:value-type="string">
            <text:p>Note / Rationale</text:p>
          </table:table-cell>
        </table:table-row>
        <table:table-row table:style-name="ro_normal">
          <table:table-cell table:style-name="ce_label" office:value-type="string">
            <text:p>Total Estimated Time</text:p>
          </table:table-cell>
          <table:table-cell table:style-name="ce_derived" office:value-type="string" fo:wrap-option="wrap">
            <text:p>22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Sum of per-wave estimates — actual time varies</text:p>
          </table:table-cell>
        </table:table-row>
        <table:table-row table:style-name="ro_normal">
          <table:table-cell table:style-name="ce_label" office:value-type="string">
            <text:p>Total Waves</text:p>
          </table:table-cell>
          <table:table-cell table:style-name="ce_derived" office:value-type="string" fo:wrap-option="wrap">
            <text:p>5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Wave 1 — Physical host — must be restored first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Estimated Time</text:p>
          </table:table-cell>
          <table:table-cell table:style-name="ce_derived" office:value-type="string" fo:wrap-option="wrap">
            <text:p>9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pve01 (Proxmox 8.2-1)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No prerequisites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Wave 2 — Storage layer — must be available before VMs can start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Estimated Time</text:p>
          </table:table-cell>
          <table:table-cell table:style-name="ce_derived" office:value-type="string" fo:wrap-option="wrap">
            <text:p>5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local (dir, 44.1 GB free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</text:p>
          </table:table-cell>
        </table:table-row>
        <table:table-row table:style-name="ro_normal">
          <table:table-cell table:style-name="ce_label" office:value-type="string">
            <text:p>local-zfs (zfspool, 160.4 GB free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</text:p>
          </table:table-cell>
        </table:table-row>
        <table:table-row table:style-name="ro_normal">
          <table:table-cell table:style-name="ce_label" office:value-type="string">
            <text:p>rpool (ZFS mirror, 412.8 GB free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</text:p>
          </table:table-cell>
        </table:table-row>
        <table:table-row table:style-name="ro_normal">
          <table:table-cell table:style-name="ce_label" office:value-type="string">
            <text:p>vmbr0 (bridge, 192.168.1.10/24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Wave 3 — Restore 2 component(s) — no mutual dependencie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Estimated Time</text:p>
          </table:table-cell>
          <table:table-cell table:style-name="ce_derived" office:value-type="string" fo:wrap-option="wrap">
            <text:p>4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forgejo (VM 101)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Depends on: pve01 (Proxmox 8.2-1), rpool (ZFS mirror, 412.8 GB free), vmbr0 (bridge, 192.168.1.10/24)</text:p>
          </table:table-cell>
        </table:table-row>
        <table:table-row table:style-name="ro_normal">
          <table:table-cell table:style-name="ce_label" office:value-type="string">
            <text:p>infra-bootstrap (VM 100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, rpool (ZFS mirror, 412.8 GB free), vmbr0 (bridge, 192.168.1.10/24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Wave 4 — Restore: inventory (VM 102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Estimated Time</text:p>
          </table:table-cell>
          <table:table-cell table:style-name="ce_derived" office:value-type="string" fo:wrap-option="wrap">
            <text:p>2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inventory (VM 102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, rpool (ZFS mirror, 412.8 GB free), vmbr0 (bridge, 192.168.1.10/24), forgejo (VM 101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Wave 5 — Restore: assessment-engine (VM 103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Estimated Time</text:p>
          </table:table-cell>
          <table:table-cell table:style-name="ce_derived" office:value-type="string" fo:wrap-option="wrap">
            <text:p>2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ssessment-engine (VM 103)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Depends on: pve01 (Proxmox 8.2-1), rpool (ZFS mirror, 412.8 GB free), vmbr0 (bridge, 192.168.1.10/24), forgejo (VM 101), inventory (VM 102)</text:p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CLASS LEGEND:</text:p>
          </table:table-cell>
          <table:table-cell table:style-name="ce_note" office:value-type="string">
            <text:p>[AUTO] From assessment  [DERIVED] Computed  [HUMAN] Operator input  [UNRESOLVED] Missing — see note</text:p>
          </table:table-cell>
          <table:table-cell table:style-name="Default" office:value-type="string">
            <text:p/>
          </table:table-cell>
          <table:table-cell table:style-name="Default" office:value-type="string">
            <text:p/>
          </table:table-cell>
        </table:table-row>
      </table:table>
      <table:table table:name="Component Details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Component Recovery Details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Field</text:p>
          </table:table-cell>
          <table:table-cell table:style-name="ce_label" office:value-type="string">
            <text:p>Value</text:p>
          </table:table-cell>
          <table:table-cell table:style-name="ce_label" office:value-type="string">
            <text:p>Class</text:p>
          </table:table-cell>
          <table:table-cell table:style-name="ce_label" office:value-type="string">
            <text:p>Note / Rationale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pve01 (Proxmox 8.2-1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store procedure never tested for host:pve01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host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Proxmox Version</text:p>
          </table:table-cell>
          <table:table-cell table:style-name="ce_auto" office:value-type="string" fo:wrap-option="wrap">
            <text:p>8.2-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Kernel</text:p>
          </table:table-cell>
          <table:table-cell table:style-name="ce_auto" office:value-type="string" fo:wrap-option="wrap">
            <text:p>6.8.4-2-pv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Hostname</text:p>
          </table:table-cell>
          <table:table-cell table:style-name="ce_auto" office:value-type="string" fo:wrap-option="wrap">
            <text:p>pve0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auto" office:value-type="string" fo:wrap-option="wrap">
            <text:p>Present (1 day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Tested</text:p>
          </table:table-cell>
          <table:table-cell table:style-name="ce_auto" office:value-type="string" fo:wrap-option="wrap">
            <text:p>No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GAP: UNTESTED_RESTORE</text:p>
          </table:table-cell>
          <table:table-cell table:style-name="Default" office:value-type="string" fo:wrap-option="wrap">
            <text:p>Restore procedure never tested for host:pve01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mediation: Perform restore test to isolated environment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pve01 (Proxmox 8.2-1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rpool (ZFS mirror, 412.8 GB free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storag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Pool Name</text:p>
          </table:table-cell>
          <table:table-cell table:style-name="ce_auto" office:value-type="string" fo:wrap-option="wrap">
            <text:p>rpool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Topology</text:p>
          </table:table-cell>
          <table:table-cell table:style-name="ce_auto" office:value-type="string" fo:wrap-option="wrap">
            <text:p>mirror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Total Gb</text:p>
          </table:table-cell>
          <table:table-cell table:style-name="ce_auto" office:value-type="string" fo:wrap-option="wrap">
            <text:p>916.4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Free Gb</text:p>
          </table:table-cell>
          <table:table-cell table:style-name="ce_auto" office:value-type="string" fo:wrap-option="wrap">
            <text:p>412.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ate</text:p>
          </table:table-cell>
          <table:table-cell table:style-name="ce_auto" office:value-type="string" fo:wrap-option="wrap">
            <text:p>ONLIN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evices</text:p>
          </table:table-cell>
          <table:table-cell table:style-name="ce_auto" office:value-type="string" fo:wrap-option="wrap">
            <text:p>['sda', 'sdb']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orage Type</text:p>
          </table:table-cell>
          <table:table-cell table:style-name="ce_auto" office:value-type="string" fo:wrap-option="wrap">
            <text:p>zfspool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unresolved" office:value-type="string" fo:wrap-option="wrap">
            <text:p>Unknown (Tier 1 assessment)</text:p>
          </table:table-cell>
          <table:table-cell table:style-name="ce_label" office:value-type="string">
            <text:p>[UNRESOLVED]</text:p>
          </table:table-cell>
          <table:table-cell table:style-name="ce_note" office:value-type="string" fo:wrap-option="wrap">
            <text:p>Run Tier 2 assessment to collect backup inventory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rpool (ZFS mirror, 412.8 GB free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local (dir, 44.1 GB free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storag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orage Name</text:p>
          </table:table-cell>
          <table:table-cell table:style-name="ce_auto" office:value-type="string" fo:wrap-option="wrap">
            <text:p>local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orage Type</text:p>
          </table:table-cell>
          <table:table-cell table:style-name="ce_auto" office:value-type="string" fo:wrap-option="wrap">
            <text:p>dir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Total Gb</text:p>
          </table:table-cell>
          <table:table-cell table:style-name="ce_auto" office:value-type="string" fo:wrap-option="wrap">
            <text:p>50.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Free Gb</text:p>
          </table:table-cell>
          <table:table-cell table:style-name="ce_auto" office:value-type="string" fo:wrap-option="wrap">
            <text:p>44.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ctive</text:p>
          </table:table-cell>
          <table:table-cell table:style-name="ce_auto" office:value-type="string" fo:wrap-option="wrap">
            <text:p>Tru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unresolved" office:value-type="string" fo:wrap-option="wrap">
            <text:p>Unknown (Tier 1 assessment)</text:p>
          </table:table-cell>
          <table:table-cell table:style-name="ce_label" office:value-type="string">
            <text:p>[UNRESOLVED]</text:p>
          </table:table-cell>
          <table:table-cell table:style-name="ce_note" office:value-type="string" fo:wrap-option="wrap">
            <text:p>Run Tier 2 assessment to collect backup inventory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local (dir, 44.1 GB free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local-zfs (zfspool, 160.4 GB free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storag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orage Name</text:p>
          </table:table-cell>
          <table:table-cell table:style-name="ce_auto" office:value-type="string" fo:wrap-option="wrap">
            <text:p>local-zfs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orage Type</text:p>
          </table:table-cell>
          <table:table-cell table:style-name="ce_auto" office:value-type="string" fo:wrap-option="wrap">
            <text:p>zfspool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Total Gb</text:p>
          </table:table-cell>
          <table:table-cell table:style-name="ce_auto" office:value-type="string" fo:wrap-option="wrap">
            <text:p>412.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Free Gb</text:p>
          </table:table-cell>
          <table:table-cell table:style-name="ce_auto" office:value-type="string" fo:wrap-option="wrap">
            <text:p>160.4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ctive</text:p>
          </table:table-cell>
          <table:table-cell table:style-name="ce_auto" office:value-type="string" fo:wrap-option="wrap">
            <text:p>Tru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unresolved" office:value-type="string" fo:wrap-option="wrap">
            <text:p>Unknown (Tier 1 assessment)</text:p>
          </table:table-cell>
          <table:table-cell table:style-name="ce_label" office:value-type="string">
            <text:p>[UNRESOLVED]</text:p>
          </table:table-cell>
          <table:table-cell table:style-name="ce_note" office:value-type="string" fo:wrap-option="wrap">
            <text:p>Run Tier 2 assessment to collect backup inventory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local-zfs (zfspool, 160.4 GB free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vmbr0 (bridge, 192.168.1.10/24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network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ridge Name</text:p>
          </table:table-cell>
          <table:table-cell table:style-name="ce_auto" office:value-type="string" fo:wrap-option="wrap">
            <text:p>vmbr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Ports</text:p>
          </table:table-cell>
          <table:table-cell table:style-name="ce_auto" office:value-type="string" fo:wrap-option="wrap">
            <text:p>['enp2s0']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ddresses</text:p>
          </table:table-cell>
          <table:table-cell table:style-name="ce_auto" office:value-type="string" fo:wrap-option="wrap">
            <text:p>['192.168.1.10/24']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lan Aware</text:p>
          </table:table-cell>
          <table:table-cell table:style-name="ce_auto" office:value-type="string" fo:wrap-option="wrap">
            <text:p>Fals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unresolved" office:value-type="string" fo:wrap-option="wrap">
            <text:p>Unknown (Tier 1 assessment)</text:p>
          </table:table-cell>
          <table:table-cell table:style-name="ce_label" office:value-type="string">
            <text:p>[UNRESOLVED]</text:p>
          </table:table-cell>
          <table:table-cell table:style-name="ce_note" office:value-type="string" fo:wrap-option="wrap">
            <text:p>Run Tier 2 assessment to collect backup inventory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vmbr0 (bridge, 192.168.1.10/24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infra-bootstrap (VM 100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2d old, restore tested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vm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mid</text:p>
          </table:table-cell>
          <table:table-cell table:style-name="ce_auto" office:value-type="string" fo:wrap-option="wrap">
            <text:p>10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Name</text:p>
          </table:table-cell>
          <table:table-cell table:style-name="ce_auto" office:value-type="string" fo:wrap-option="wrap">
            <text:p>infra-bootstrap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atus</text:p>
          </table:table-cell>
          <table:table-cell table:style-name="ce_auto" office:value-type="string" fo:wrap-option="wrap">
            <text:p>running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Cores</text:p>
          </table:table-cell>
          <table:table-cell table:style-name="ce_auto" office:value-type="string" fo:wrap-option="wrap">
            <text:p>4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Memory Mb</text:p>
          </table:table-cell>
          <table:table-cell table:style-name="ce_auto" office:value-type="string" fo:wrap-option="wrap">
            <text:p>819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isk Gb</text:p>
          </table:table-cell>
          <table:table-cell table:style-name="ce_auto" office:value-type="string" fo:wrap-option="wrap">
            <text:p>64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auto" office:value-type="string" fo:wrap-option="wrap">
            <text:p>Present (2 day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Tested</text:p>
          </table:table-cell>
          <table:table-cell table:style-name="ce_auto" office:value-type="string" fo:wrap-option="wrap">
            <text:p>Yes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infra-bootstrap (VM 100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forgejo (VM 101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Backup is 9 days old (threshold: 7 days for vm); Restore procedure never tested for vm:forgejo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vm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mid</text:p>
          </table:table-cell>
          <table:table-cell table:style-name="ce_auto" office:value-type="string" fo:wrap-option="wrap">
            <text:p>10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Name</text:p>
          </table:table-cell>
          <table:table-cell table:style-name="ce_auto" office:value-type="string" fo:wrap-option="wrap">
            <text:p>forgejo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atus</text:p>
          </table:table-cell>
          <table:table-cell table:style-name="ce_auto" office:value-type="string" fo:wrap-option="wrap">
            <text:p>running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Cores</text:p>
          </table:table-cell>
          <table:table-cell table:style-name="ce_auto" office:value-type="string" fo:wrap-option="wrap">
            <text:p>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Memory Mb</text:p>
          </table:table-cell>
          <table:table-cell table:style-name="ce_auto" office:value-type="string" fo:wrap-option="wrap">
            <text:p>4096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isk Gb</text:p>
          </table:table-cell>
          <table:table-cell table:style-name="ce_auto" office:value-type="string" fo:wrap-option="wrap">
            <text:p>10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auto" office:value-type="string" fo:wrap-option="wrap">
            <text:p>Present (9 day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Tested</text:p>
          </table:table-cell>
          <table:table-cell table:style-name="ce_auto" office:value-type="string" fo:wrap-option="wrap">
            <text:p>No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GAP: STALE_BACKUP</text:p>
          </table:table-cell>
          <table:table-cell table:style-name="Default" office:value-type="string" fo:wrap-option="wrap">
            <text:p>Backup is 9 days old (threshold: 7 days for vm)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mediation: Run manual backup or verify schedule</text:p>
          </table:table-cell>
        </table:table-row>
        <table:table-row table:style-name="ro_normal">
          <table:table-cell table:style-name="ce_label" office:value-type="string">
            <text:p>GAP: UNTESTED_RESTORE</text:p>
          </table:table-cell>
          <table:table-cell table:style-name="Default" office:value-type="string" fo:wrap-option="wrap">
            <text:p>Restore procedure never tested for vm:forgejo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mediation: Perform restore test to isolated environment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forgejo (VM 101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inventory (VM 102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1d old, restore tested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vm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mid</text:p>
          </table:table-cell>
          <table:table-cell table:style-name="ce_auto" office:value-type="string" fo:wrap-option="wrap">
            <text:p>10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Name</text:p>
          </table:table-cell>
          <table:table-cell table:style-name="ce_auto" office:value-type="string" fo:wrap-option="wrap">
            <text:p>inventory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atus</text:p>
          </table:table-cell>
          <table:table-cell table:style-name="ce_auto" office:value-type="string" fo:wrap-option="wrap">
            <text:p>running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Cores</text:p>
          </table:table-cell>
          <table:table-cell table:style-name="ce_auto" office:value-type="string" fo:wrap-option="wrap">
            <text:p>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Memory Mb</text:p>
          </table:table-cell>
          <table:table-cell table:style-name="ce_auto" office:value-type="string" fo:wrap-option="wrap">
            <text:p>204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isk Gb</text:p>
          </table:table-cell>
          <table:table-cell table:style-name="ce_auto" office:value-type="string" fo:wrap-option="wrap">
            <text:p>3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auto" office:value-type="string" fo:wrap-option="wrap">
            <text:p>Present (1 day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Tested</text:p>
          </table:table-cell>
          <table:table-cell table:style-name="ce_auto" office:value-type="string" fo:wrap-option="wrap">
            <text:p>Yes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inventory (VM 102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assessment-engine (VM 103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store procedure never tested for vm:assessment-engine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vm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mid</text:p>
          </table:table-cell>
          <table:table-cell table:style-name="ce_auto" office:value-type="string" fo:wrap-option="wrap">
            <text:p>103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Name</text:p>
          </table:table-cell>
          <table:table-cell table:style-name="ce_auto" office:value-type="string" fo:wrap-option="wrap">
            <text:p>assessment-engin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atus</text:p>
          </table:table-cell>
          <table:table-cell table:style-name="ce_auto" office:value-type="string" fo:wrap-option="wrap">
            <text:p>running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Cores</text:p>
          </table:table-cell>
          <table:table-cell table:style-name="ce_auto" office:value-type="string" fo:wrap-option="wrap">
            <text:p>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Memory Mb</text:p>
          </table:table-cell>
          <table:table-cell table:style-name="ce_auto" office:value-type="string" fo:wrap-option="wrap">
            <text:p>4096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isk Gb</text:p>
          </table:table-cell>
          <table:table-cell table:style-name="ce_auto" office:value-type="string" fo:wrap-option="wrap">
            <text:p>5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auto" office:value-type="string" fo:wrap-option="wrap">
            <text:p>Present (1 day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Tested</text:p>
          </table:table-cell>
          <table:table-cell table:style-name="ce_auto" office:value-type="string" fo:wrap-option="wrap">
            <text:p>No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GAP: UNTESTED_RESTORE</text:p>
          </table:table-cell>
          <table:table-cell table:style-name="Default" office:value-type="string" fo:wrap-option="wrap">
            <text:p>Restore procedure never tested for vm:assessment-engine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mediation: Perform restore test to isolated environment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assessment-engine (VM 103)</text:p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CLASS LEGEND:</text:p>
          </table:table-cell>
          <table:table-cell table:style-name="ce_note" office:value-type="string">
            <text:p>[AUTO] From assessment  [DERIVED] Computed  [HUMAN] Operator input  [UNRESOLVED] Missing — see note</text:p>
          </table:table-cell>
          <table:table-cell table:style-name="Default" office:value-type="string">
            <text:p/>
          </table:table-cell>
          <table:table-cell table:style-name="Default" office:value-type="string">
            <text:p/>
          </table:table-cell>
        </table:table-row>
      </table:table>
      <table:table table:name="Recovery Readiness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Recovery Readiness Report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Overall Score</text:p>
          </table:table-cell>
          <table:table-cell table:style-name="ce_auto" office:value-type="string">
            <text:p>⚠ YELLOW</text:p>
          </table:table-cell>
          <table:table-cell table:style-name="ce_note" office:value-type="string" fo:wrap-option="wrap">
            <text:p>3 component(s) with minor gaps</text:p>
          </table:table-cell>
          <table:table-cell/>
        </table:table-row>
        <table:table-row table:style-name="ro_normal">
          <table:table-cell table:number-columns-repeated="4"/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Component Score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pve01 (Proxmox 8.2-1)</text:p>
          </table:table-cell>
          <table:table-cell table:style-name="ce_auto" office:value-type="string">
            <text:p>⚠ YELLOW</text:p>
          </table:table-cell>
          <table:table-cell table:style-name="ce_note" office:value-type="string" fo:wrap-option="wrap">
            <text:p>Restore procedure never tested for host:pve01</text:p>
          </table:table-cell>
          <table:table-cell/>
        </table:table-row>
        <table:table-row table:style-name="ro_normal">
          <table:table-cell table:style-name="ce_label" office:value-type="string">
            <text:p>rpool (ZFS mirror, 412.8 GB free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), all checks passed</text:p>
          </table:table-cell>
          <table:table-cell/>
        </table:table-row>
        <table:table-row table:style-name="ro_normal">
          <table:table-cell table:style-name="ce_label" office:value-type="string">
            <text:p>local (dir, 44.1 GB free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), all checks passed</text:p>
          </table:table-cell>
          <table:table-cell/>
        </table:table-row>
        <table:table-row table:style-name="ro_normal">
          <table:table-cell table:style-name="ce_label" office:value-type="string">
            <text:p>local-zfs (zfspool, 160.4 GB free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), all checks passed</text:p>
          </table:table-cell>
          <table:table-cell/>
        </table:table-row>
        <table:table-row table:style-name="ro_normal">
          <table:table-cell table:style-name="ce_label" office:value-type="string">
            <text:p>vmbr0 (bridge, 192.168.1.10/24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), all checks passed</text:p>
          </table:table-cell>
          <table:table-cell/>
        </table:table-row>
        <table:table-row table:style-name="ro_normal">
          <table:table-cell table:style-name="ce_label" office:value-type="string">
            <text:p>infra-bootstrap (VM 100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2d old, restore tested), all checks passed</text:p>
          </table:table-cell>
          <table:table-cell/>
        </table:table-row>
        <table:table-row table:style-name="ro_normal">
          <table:table-cell table:style-name="ce_label" office:value-type="string">
            <text:p>forgejo (VM 101)</text:p>
          </table:table-cell>
          <table:table-cell table:style-name="ce_auto" office:value-type="string">
            <text:p>⚠ YELLOW</text:p>
          </table:table-cell>
          <table:table-cell table:style-name="ce_note" office:value-type="string" fo:wrap-option="wrap">
            <text:p>Backup is 9 days old (threshold: 7 days for vm); Restore procedure never tested for vm:forgejo</text:p>
          </table:table-cell>
          <table:table-cell/>
        </table:table-row>
        <table:table-row table:style-name="ro_normal">
          <table:table-cell table:style-name="ce_label" office:value-type="string">
            <text:p>inventory (VM 102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1d old, restore tested), all checks passed</text:p>
          </table:table-cell>
          <table:table-cell/>
        </table:table-row>
        <table:table-row table:style-name="ro_normal">
          <table:table-cell table:style-name="ce_label" office:value-type="string">
            <text:p>assessment-engine (VM 103)</text:p>
          </table:table-cell>
          <table:table-cell table:style-name="ce_auto" office:value-type="string">
            <text:p>⚠ YELLOW</text:p>
          </table:table-cell>
          <table:table-cell table:style-name="ce_note" office:value-type="string" fo:wrap-option="wrap">
            <text:p>Restore procedure never tested for vm:assessment-engine</text:p>
          </table:table-cell>
          <table:table-cell/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Gaps Requiring Attention (4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pve01 (Proxmox 8.2-1) — UNTESTED_RESTORE</text:p>
          </table:table-cell>
          <table:table-cell table:style-name="Default" office:value-type="string" fo:wrap-option="wrap">
            <text:p>Restore procedure never tested for host:pve01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Fix: Perform restore test to isolated environment  |  Impact: Restore procedure unvalidated; actual RTO unknown</text:p>
          </table:table-cell>
        </table:table-row>
        <table:table-row table:style-name="ro_normal">
          <table:table-cell table:style-name="ce_label" office:value-type="string">
            <text:p>forgejo (VM 101) — STALE_BACKUP</text:p>
          </table:table-cell>
          <table:table-cell table:style-name="Default" office:value-type="string" fo:wrap-option="wrap">
            <text:p>Backup is 9 days old (threshold: 7 days for vm)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Fix: Run manual backup or verify schedule  |  Impact: Recovery point may not meet RPO</text:p>
          </table:table-cell>
        </table:table-row>
        <table:table-row table:style-name="ro_normal">
          <table:table-cell table:style-name="ce_label" office:value-type="string">
            <text:p>forgejo (VM 101) — UNTESTED_RESTORE</text:p>
          </table:table-cell>
          <table:table-cell table:style-name="Default" office:value-type="string" fo:wrap-option="wrap">
            <text:p>Restore procedure never tested for vm:forgejo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Fix: Perform restore test to isolated environment  |  Impact: Restore procedure unvalidated; actual RTO unknown</text:p>
          </table:table-cell>
        </table:table-row>
        <table:table-row table:style-name="ro_normal">
          <table:table-cell table:style-name="ce_label" office:value-type="string">
            <text:p>assessment-engine (VM 103) — UNTESTED_RESTORE</text:p>
          </table:table-cell>
          <table:table-cell table:style-name="Default" office:value-type="string" fo:wrap-option="wrap">
            <text:p>Restore procedure never tested for vm:assessment-engine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Fix: Perform restore test to isolated environment  |  Impact: Restore procedure unvalidated; actual RTO unknown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Single Points of Failure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pve01 (Proxmox 8.2-1)</text:p>
          </table:table-cell>
          <table:table-cell table:style-name="Default" office:value-type="string" fo:wrap-option="wrap">
            <text:p>8 component(s) depend on this</text:p>
          </table:table-cell>
          <table:table-cell table:style-name="ce_label" office:value-type="string">
            <text:p>[ORANGE]</text:p>
          </table:table-cell>
          <table:table-cell table:style-name="ce_note" office:value-type="string" fo:wrap-option="wrap">
            <text:p>Consider adding redundancy or offsite backup</text:p>
          </table:table-cell>
        </table:table-row>
        <table:table-row table:style-name="ro_normal">
          <table:table-cell table:style-name="ce_label" office:value-type="string">
            <text:p>rpool (ZFS mirror, 412.8 GB free)</text:p>
          </table:table-cell>
          <table:table-cell table:style-name="Default" office:value-type="string" fo:wrap-option="wrap">
            <text:p>4 component(s) depend on this</text:p>
          </table:table-cell>
          <table:table-cell table:style-name="ce_label" office:value-type="string">
            <text:p>[ORANGE]</text:p>
          </table:table-cell>
          <table:table-cell table:style-name="ce_note" office:value-type="string" fo:wrap-option="wrap">
            <text:p>Consider adding redundancy or offsite backup</text:p>
          </table:table-cell>
        </table:table-row>
        <table:table-row table:style-name="ro_normal">
          <table:table-cell table:style-name="ce_label" office:value-type="string">
            <text:p>vmbr0 (bridge, 192.168.1.10/24)</text:p>
          </table:table-cell>
          <table:table-cell table:style-name="Default" office:value-type="string" fo:wrap-option="wrap">
            <text:p>4 component(s) depend on this</text:p>
          </table:table-cell>
          <table:table-cell table:style-name="ce_label" office:value-type="string">
            <text:p>[ORANGE]</text:p>
          </table:table-cell>
          <table:table-cell table:style-name="ce_note" office:value-type="string" fo:wrap-option="wrap">
            <text:p>Consider adding redundancy or offsite backup</text:p>
          </table:table-cell>
        </table:table-row>
        <table:table-row table:style-name="ro_normal">
          <table:table-cell table:style-name="ce_label" office:value-type="string">
            <text:p>forgejo (VM 101)</text:p>
          </table:table-cell>
          <table:table-cell table:style-name="Default" office:value-type="string" fo:wrap-option="wrap">
            <text:p>2 component(s) depend on this</text:p>
          </table:table-cell>
          <table:table-cell table:style-name="ce_label" office:value-type="string">
            <text:p>[ORANGE]</text:p>
          </table:table-cell>
          <table:table-cell table:style-name="ce_note" office:value-type="string" fo:wrap-option="wrap">
            <text:p>Consider adding redundancy or offsite backup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Human Input Required During Recove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Incident start time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when recovery was initiated</text:p>
          </table:table-cell>
        </table:table-row>
        <table:table-row table:style-name="ro_normal">
          <table:table-cell table:style-name="ce_label" office:value-type="string">
            <text:p>Affected components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List components confirmed as failed</text:p>
          </table:table-cell>
        </table:table-row>
        <table:table-row table:style-name="ro_normal">
          <table:table-cell table:style-name="ce_label" office:value-type="string">
            <text:p>Recovery decision maker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Name of person authorising recovery</text:p>
          </table:table-cell>
        </table:table-row>
        <table:table-row table:style-name="ro_normal">
          <table:table-cell table:style-name="ce_label" office:value-type="string">
            <text:p>KeePass database available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Confirm KeePass database is accessible</text:p>
          </table:table-cell>
        </table:table-row>
        <table:table-row table:style-name="ro_normal">
          <table:table-cell table:style-name="ce_label" office:value-type="string">
            <text:p>Physical access confirmed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Confirm physical host access</text:p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CLASS LEGEND:</text:p>
          </table:table-cell>
          <table:table-cell table:style-name="ce_note" office:value-type="string">
            <text:p>[AUTO] From assessment  [DERIVED] Computed  [HUMAN] Operator input  [UNRESOLVED] Missing — see note</text:p>
          </table:table-cell>
          <table:table-cell table:style-name="Default" office:value-type="string">
            <text:p/>
          </table:table-cell>
          <table:table-cell table:style-name="Default" office:value-type="string">
            <text:p/>
          </table:table-cell>
        </table:table-row>
      </table:table>
      <table:table table:name="Generation Report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Recovery Documentation Generation Report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Field</text:p>
          </table:table-cell>
          <table:table-cell table:style-name="ce_label" office:value-type="string">
            <text:p>Value</text:p>
          </table:table-cell>
          <table:table-cell table:style-name="ce_label" office:value-type="string">
            <text:p>Class</text:p>
          </table:table-cell>
          <table:table-cell table:style-name="ce_label" office:value-type="string">
            <text:p>Note / Rationale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Generation Metadata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Generated At</text:p>
          </table:table-cell>
          <table:table-cell table:style-name="ce_auto" office:value-type="string" fo:wrap-option="wrap">
            <text:p>2026-05-31T13:26:26Z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Mode</text:p>
          </table:table-cell>
          <table:table-cell table:style-name="ce_auto" office:value-type="string" fo:wrap-option="wrap">
            <text:p>recovery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ssessment Tier</text:p>
          </table:table-cell>
          <table:table-cell table:style-name="ce_auto" office:value-type="string" fo:wrap-option="wrap">
            <text:p>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ssessment Date</text:p>
          </table:table-cell>
          <table:table-cell table:style-name="ce_auto" office:value-type="string" fo:wrap-option="wrap">
            <text:p>2026-05-29T02:05:00Z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Graph Summa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Nodes</text:p>
          </table:table-cell>
          <table:table-cell table:style-name="ce_derived" office:value-type="string" fo:wrap-option="wrap">
            <text:p>9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Edges</text:p>
          </table:table-cell>
          <table:table-cell table:style-name="ce_derived" office:value-type="string" fo:wrap-option="wrap">
            <text:p>19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Waves</text:p>
          </table:table-cell>
          <table:table-cell table:style-name="ce_derived" office:value-type="string" fo:wrap-option="wrap">
            <text:p>5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Estimated Total Time</text:p>
          </table:table-cell>
          <table:table-cell table:style-name="ce_derived" office:value-type="string" fo:wrap-option="wrap">
            <text:p>22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Readiness Summa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GREEN</text:p>
          </table:table-cell>
          <table:table-cell table:style-name="Default" office:value-type="string" fo:wrap-option="wrap">
            <text:p>6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YELLOW</text:p>
          </table:table-cell>
          <table:table-cell table:style-name="Default" office:value-type="string" fo:wrap-option="wrap">
            <text:p>3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able="urn:oasis:names:tc:opendocument:xmlns:table:1.0" office:version="1.2">
  <office:styles>
    <style:style style:name="Default" style:family="table-cell">
      <style:text-properties fo:font-size="10pt"/>
    </style:style>
  </office:styles>
  <office:automatic-styles/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Assessment Engine doc-gen v1.0</meta:generator>
  </office:meta>
</office:document-meta>
</file>