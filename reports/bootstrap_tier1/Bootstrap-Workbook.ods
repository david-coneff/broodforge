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xmlns:meta="urn:oasis:names:tc:opendocument:xmlns:meta:1.0" office:version="1.2">
  <office:automatic-styles>
    <!-- Section header -->
    <style:style style:name="ce_section" style:family="table-cell">
      <style:text-properties fo:font-weight="bold" fo:font-size="10pt" fo:color="#1F3864" fo:background-color="#D6E4F0"/>
      <style:table-cell-properties fo:background-color="#D6E4F0" fo:padding="2pt"/>
    </style:style>
    <!-- Sheet title -->
    <style:style style:name="ce_title" style:family="table-cell">
      <style:text-properties fo:font-weight="bold" fo:font-size="12pt" fo:color="#1F3864"/>
    </style:style>
    <!-- Label column -->
    <style:style style:name="ce_label" style:family="table-cell">
      <style:text-properties fo:font-weight="bold" fo:font-size="10pt"/>
    </style:style>
    <!-- AUTO field value -->
    <style:style style:name="ce_auto" style:family="table-cell">
      <style:text-properties fo:font-size="10pt" fo:color="#1A5276"/>
      <style:table-cell-properties fo:background-color="#EBF5FB"/>
    </style:style>
    <!-- DERIVED field value -->
    <style:style style:name="ce_derived" style:family="table-cell">
      <style:text-properties fo:font-size="10pt" fo:color="#145A32"/>
      <style:table-cell-properties fo:background-color="#EAFAF1"/>
    </style:style>
    <!-- HUMAN field value (blank, highlighted for input) -->
    <style:style style:name="ce_human" style:family="table-cell">
      <style:text-properties fo:font-size="10pt" fo:color="#7D6608"/>
      <style:table-cell-properties fo:background-color="#FEFDE7" style:cell-protect="formula-hidden"/>
    </style:style>
    <!-- UNRESOLVED field value -->
    <style:style style:name="ce_unresolved" style:family="table-cell">
      <style:text-properties fo:font-size="10pt" fo:color="#78281F"/>
      <style:table-cell-properties fo:background-color="#FDEDEC"/>
    </style:style>
    <!-- Rationale / note text -->
    <style:style style:name="ce_note" style:family="table-cell">
      <style:text-properties fo:font-size="9pt" fo:color="#555555" fo:font-style="italic"/>
    </style:style>
    <!-- Checkbox placeholder -->
    <style:style style:name="ce_checkbox" style:family="table-cell">
      <style:text-properties fo:font-size="10pt"/>
      <style:table-cell-properties fo:background-color="#FFF9C4"/>
    </style:style>
    <!-- Column width styles -->
    <style:style style:name="co_label" style:family="table-column">
      <style:table-column-properties style:column-width="5.5cm"/>
    </style:style>
    <style:style style:name="co_value" style:family="table-column">
      <style:table-column-properties style:column-width="9cm"/>
    </style:style>
    <style:style style:name="co_note" style:family="table-column">
      <style:table-column-properties style:column-width="10cm"/>
    </style:style>
    <style:style style:name="co_class" style:family="table-column">
      <style:table-column-properties style:column-width="2.5cm"/>
    </style:style>
    <!-- Row height for section headers -->
    <style:style style:name="ro_section" style:family="table-row">
      <style:table-row-properties style:row-height="0.7cm" fo:background-color="#D6E4F0"/>
    </style:style>
    <style:style style:name="ro_normal" style:family="table-row">
      <style:table-row-properties style:row-height="0.55cm"/>
    </style:style>
  </office:automatic-styles>
  <office:body>
    <office:spreadsheet>
      <table:table table:name="Stage 01 — Host Preparation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Stage 01 — Proxmox Host Preparation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Field</text:p>
          </table:table-cell>
          <table:table-cell table:style-name="ce_label" office:value-type="string">
            <text:p>Value</text:p>
          </table:table-cell>
          <table:table-cell table:style-name="ce_label" office:value-type="string">
            <text:p>Class</text:p>
          </table:table-cell>
          <table:table-cell table:style-name="ce_label" office:value-type="string">
            <text:p>Note / Rationale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Host Identification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Hostname</text:p>
          </table:table-cell>
          <table:table-cell table:style-name="ce_auto" office:value-type="string" fo:wrap-option="wrap">
            <text:p>pve0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manifest: host.hostname</text:p>
          </table:table-cell>
        </table:table-row>
        <table:table-row table:style-name="ro_normal">
          <table:table-cell table:style-name="ce_label" office:value-type="string">
            <text:p>FQDN</text:p>
          </table:table-cell>
          <table:table-cell table:style-name="ce_auto" office:value-type="string" fo:wrap-option="wrap">
            <text:p>pve01.internal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manifest: host.fqdn</text:p>
          </table:table-cell>
        </table:table-row>
        <table:table-row table:style-name="ro_normal">
          <table:table-cell table:style-name="ce_label" office:value-type="string">
            <text:p>Proxmox Version</text:p>
          </table:table-cell>
          <table:table-cell table:style-name="ce_auto" office:value-type="string" fo:wrap-option="wrap">
            <text:p>8.2-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manifest: host.proxmox_version</text:p>
          </table:table-cell>
        </table:table-row>
        <table:table-row table:style-name="ro_normal">
          <table:table-cell table:style-name="ce_label" office:value-type="string">
            <text:p>Kernel Version</text:p>
          </table:table-cell>
          <table:table-cell table:style-name="ce_auto" office:value-type="string" fo:wrap-option="wrap">
            <text:p>6.8.4-2-pv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manifest: host.kernel_version</text:p>
          </table:table-cell>
        </table:table-row>
        <table:table-row table:style-name="ro_normal">
          <table:table-cell table:style-name="ce_label" office:value-type="string">
            <text:p>Timezone</text:p>
          </table:table-cell>
          <table:table-cell table:style-name="ce_auto" office:value-type="string" fo:wrap-option="wrap">
            <text:p>UTC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manifest: host.timezone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Hardware Summa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CPU Model</text:p>
          </table:table-cell>
          <table:table-cell table:style-name="ce_auto" office:value-type="string" fo:wrap-option="wrap">
            <text:p>Intel(R) Core(TM) i9-13900K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manifest: cpu.model</text:p>
          </table:table-cell>
        </table:table-row>
        <table:table-row table:style-name="ro_normal">
          <table:table-cell table:style-name="ce_label" office:value-type="string">
            <text:p>Logical CPU Count</text:p>
          </table:table-cell>
          <table:table-cell table:style-name="ce_auto" office:value-type="string" fo:wrap-option="wrap">
            <text:p>4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manifest: cpu.total_threads</text:p>
          </table:table-cell>
        </table:table-row>
        <table:table-row table:style-name="ro_normal">
          <table:table-cell table:style-name="ce_label" office:value-type="string">
            <text:p>Total RAM</text:p>
          </table:table-cell>
          <table:table-cell table:style-name="ce_auto" office:value-type="string" fo:wrap-option="wrap">
            <text:p>64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manifest: memory.total_gb</text:p>
          </table:table-cell>
        </table:table-row>
        <table:table-row table:style-name="ro_normal">
          <table:table-cell table:style-name="ce_label" office:value-type="string">
            <text:p>Available RAM</text:p>
          </table:table-cell>
          <table:table-cell table:style-name="ce_auto" office:value-type="string" fo:wrap-option="wrap">
            <text:p>61.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manifest: memory.available_gb</text:p>
          </table:table-cell>
        </table:table-row>
        <table:table-row table:style-name="ro_normal">
          <table:table-cell table:style-name="ce_label" office:value-type="string">
            <text:p>Virtualization</text:p>
          </table:table-cell>
          <table:table-cell table:style-name="ce_auto" office:value-type="string" fo:wrap-option="wrap">
            <text:p>VT-x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manifest: cpu.virtualization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Storage Invento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Block Devices</text:p>
          </table:table-cell>
          <table:table-cell table:style-name="ce_auto" office:value-type="string" fo:wrap-option="wrap">
            <text:p>sda: 931.5 GB  model=Samsung SSD 870 EVO 1TB  rotational=False
sdb: 931.5 GB  model=Samsung SSD 870 EVO 1TB  rotational=Fals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Detected from lsblk</text:p>
          </table:table-cell>
        </table:table-row>
        <table:table-row table:style-name="ro_normal">
          <table:table-cell table:style-name="ce_label" office:value-type="string">
            <text:p>Existing ZFS Pools</text:p>
          </table:table-cell>
          <table:table-cell table:style-name="ce_auto" office:value-type="string" fo:wrap-option="wrap">
            <text:p>rpool: topology=mirror  free=810.1 G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zpool list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ZFS Configuration Recommendation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ecommended Topology</text:p>
          </table:table-cell>
          <table:table-cell table:style-name="ce_derived" office:value-type="string" fo:wrap-option="wrap">
            <text:p>mirror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Two SSDs detected (sda, sdb). ZFS mirror recommended: full redundancy, no write penalty vs. single device.  ⚠ Existing ZFS pool(s) detected: rpool. Verify topology matches recommendation before proceeding.</text:p>
          </table:table-cell>
        </table:table-row>
        <table:table-row table:style-name="ro_normal">
          <table:table-cell table:style-name="ce_label" office:value-type="string">
            <text:p>Recommended Pool Name</text:p>
          </table:table-cell>
          <table:table-cell table:style-name="ce_derived" office:value-type="string" fo:wrap-option="wrap">
            <text:p>rpool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Pool 'rpool' has the most free space (810 GB free, topology: mirror).</text:p>
          </table:table-cell>
        </table:table-row>
        <table:table-row table:style-name="ro_normal">
          <table:table-cell table:style-name="ce_label" office:value-type="string">
            <text:p>ZFS config approved by operator</text:p>
          </table:table-cell>
          <table:table-cell table:style-name="ce_human" office:value-type="string">
            <text:p>☐  (check when complet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eview topology above. Check when confirmed.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Network Invento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Default Gateway</text:p>
          </table:table-cell>
          <table:table-cell table:style-name="ce_auto" office:value-type="string" fo:wrap-option="wrap">
            <text:p>192.168.1.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manifest: network.default_gateway</text:p>
          </table:table-cell>
        </table:table-row>
        <table:table-row table:style-name="ro_normal">
          <table:table-cell table:style-name="ce_label" office:value-type="string">
            <text:p>DNS Servers</text:p>
          </table:table-cell>
          <table:table-cell table:style-name="ce_auto" office:value-type="string" fo:wrap-option="wrap">
            <text:p>1.1.1.1, 8.8.8.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manifest: network.dns_servers</text:p>
          </table:table-cell>
        </table:table-row>
        <table:table-row table:style-name="ro_normal">
          <table:table-cell table:style-name="ce_label" office:value-type="string">
            <text:p>Network Interfaces</text:p>
          </table:table-cell>
          <table:table-cell table:style-name="ce_auto" office:value-type="string" fo:wrap-option="wrap">
            <text:p>lo: UNKNOWN  ['127.0.0.1/8', '::1/128']
enp2s0: UP  []
vmbr0: UP  ['192.168.1.10/24']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ip addr</text:p>
          </table:table-cell>
        </table:table-row>
        <table:table-row table:style-name="ro_normal">
          <table:table-cell table:style-name="ce_label" office:value-type="string">
            <text:p>Bridges</text:p>
          </table:table-cell>
          <table:table-cell table:style-name="ce_auto" office:value-type="string" fo:wrap-option="wrap">
            <text:p>vmbr0: ports=['enp2s0']  ['192.168.1.10/24']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From /etc/network/interfaces</text:p>
          </table:table-cell>
        </table:table-row>
        <table:table-row table:style-name="ro_normal">
          <table:table-cell table:style-name="ce_label" office:value-type="string">
            <text:p>Recommended VM Bridge</text:p>
          </table:table-cell>
          <table:table-cell table:style-name="ce_unresolved" office:value-type="string" fo:wrap-option="wrap">
            <text:p/>
          </table:table-cell>
          <table:table-cell table:style-name="ce_label" office:value-type="string">
            <text:p>[UNRESOL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uggested VM IP Range</text:p>
          </table:table-cell>
          <table:table-cell table:style-name="ce_derived" office:value-type="string" fo:wrap-option="wrap">
            <text:p>192.168.1.20–192.168.1.30/24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Host IP is 192.168.1.10/24. Suggested VM range: 192.168.1.20–192.168.1.30/24 (same subnet, avoids host address).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Credential Locations (Operator Input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Root password — KeePass path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Enter KeePass path, e.g. Infrastructure/proxmox/pve01-root</text:p>
          </table:table-cell>
        </table:table-row>
        <table:table-row table:style-name="ro_normal">
          <table:table-cell table:style-name="ce_label" office:value-type="string">
            <text:p>Encryption passphrase — KeePass path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If using disk encryption. Leave blank if not applicable.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Validation Checkpoints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SSH access confirmed</text:p>
          </table:table-cell>
          <table:table-cell table:style-name="ce_human" office:value-type="string">
            <text:p>☐  (check when complet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ssh root@pve01 — verify login</text:p>
          </table:table-cell>
        </table:table-row>
        <table:table-row table:style-name="ro_normal">
          <table:table-cell table:style-name="ce_label" office:value-type="string">
            <text:p>Web UI accessible</text:p>
          </table:table-cell>
          <table:table-cell table:style-name="ce_human" office:value-type="string">
            <text:p>☐  (check when complet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https://pve01:8006 — verify login</text:p>
          </table:table-cell>
        </table:table-row>
        <table:table-row table:style-name="ro_normal">
          <table:table-cell table:style-name="ce_label" office:value-type="string">
            <text:p>ZFS pool healthy</text:p>
          </table:table-cell>
          <table:table-cell table:style-name="ce_human" office:value-type="string">
            <text:p>☐  (check when complet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Run: zpool status — verify ONLINE</text:p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CLASS LEGEND:</text:p>
          </table:table-cell>
          <table:table-cell table:style-name="ce_note" office:value-type="string">
            <text:p>[AUTO] From assessment  [DERIVED] Computed  [HUMAN] Operator input  [UNRESOLVED] Missing — see note</text:p>
          </table:table-cell>
          <table:table-cell table:style-name="Default" office:value-type="string">
            <text:p/>
          </table:table-cell>
          <table:table-cell table:style-name="Default" office:value-type="string">
            <text:p/>
          </table:table-cell>
        </table:table-row>
      </table:table>
      <table:table table:name="Stage 02 — Host Assessment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Stage 02 — Host Assessment (Observed State)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Field</text:p>
          </table:table-cell>
          <table:table-cell table:style-name="ce_label" office:value-type="string">
            <text:p>Value</text:p>
          </table:table-cell>
          <table:table-cell table:style-name="ce_label" office:value-type="string">
            <text:p>Class</text:p>
          </table:table-cell>
          <table:table-cell table:style-name="ce_label" office:value-type="string">
            <text:p>Note / Rationale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CPU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Model</text:p>
          </table:table-cell>
          <table:table-cell table:style-name="ce_auto" office:value-type="string" fo:wrap-option="wrap">
            <text:p>Intel(R) Core(TM) i9-13900K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rchitecture</text:p>
          </table:table-cell>
          <table:table-cell table:style-name="ce_auto" office:value-type="string" fo:wrap-option="wrap">
            <text:p>x86_64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ockets</text:p>
          </table:table-cell>
          <table:table-cell table:style-name="ce_auto" office:value-type="string" fo:wrap-option="wrap">
            <text:p>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Cores/Socket</text:p>
          </table:table-cell>
          <table:table-cell table:style-name="ce_auto" office:value-type="string" fo:wrap-option="wrap">
            <text:p>24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Threads/Core</text:p>
          </table:table-cell>
          <table:table-cell table:style-name="ce_auto" office:value-type="string" fo:wrap-option="wrap">
            <text:p>2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Total Logical CPUs</text:p>
          </table:table-cell>
          <table:table-cell table:style-name="ce_auto" office:value-type="string" fo:wrap-option="wrap">
            <text:p>4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Virtualization</text:p>
          </table:table-cell>
          <table:table-cell table:style-name="ce_auto" office:value-type="string" fo:wrap-option="wrap">
            <text:p>VT-x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Memo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Total RAM</text:p>
          </table:table-cell>
          <table:table-cell table:style-name="ce_auto" office:value-type="string" fo:wrap-option="wrap">
            <text:p>64 G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vailable RAM</text:p>
          </table:table-cell>
          <table:table-cell table:style-name="ce_auto" office:value-type="string" fo:wrap-option="wrap">
            <text:p>61.2 G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Swap</text:p>
          </table:table-cell>
          <table:table-cell table:style-name="ce_auto" office:value-type="string" fo:wrap-option="wrap">
            <text:p>0 GB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NUMA Nodes</text:p>
          </table:table-cell>
          <table:table-cell table:style-name="ce_auto" office:value-type="string" fo:wrap-option="wrap">
            <text:p>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Storage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Block Devices</text:p>
          </table:table-cell>
          <table:table-cell table:style-name="ce_auto" office:value-type="string" fo:wrap-option="wrap">
            <text:p>sda: 931.5 GB  type=disk  rotational=False  model=Samsung SSD 870 EVO 1TB  transport=sata
sdb: 931.5 GB  type=disk  rotational=False  model=Samsung SSD 870 EVO 1TB  transport=sata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2 device(s) detected</text:p>
          </table:table-cell>
        </table:table-row>
        <table:table-row table:style-name="ro_normal">
          <table:table-cell table:style-name="ce_label" office:value-type="string">
            <text:p>ZFS Pools</text:p>
          </table:table-cell>
          <table:table-cell table:style-name="ce_auto" office:value-type="string" fo:wrap-option="wrap">
            <text:p>rpool: state=ONLINE  topology=mirror  total=916.4 GB  free=810.1 GB  devices=['sda', 'sdb']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PVE Storage</text:p>
          </table:table-cell>
          <table:table-cell table:style-name="ce_auto" office:value-type="string" fo:wrap-option="wrap">
            <text:p>local (dir): total=50.0 GB  free=44.1 GB  active=True
local-zfs (zfspool): total=810.1 GB  free=810.1 GB  active=Tru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Network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Interfaces</text:p>
          </table:table-cell>
          <table:table-cell table:style-name="ce_auto" office:value-type="string" fo:wrap-option="wrap">
            <text:p>lo: state=UNKNOWN  mac=N/A  addresses=['127.0.0.1/8', '::1/128']  mtu=65536
enp2s0: state=UP  mac=aa:bb:cc:dd:ee:01  addresses=[]  mtu=1500
vmbr0: state=UP  mac=aa:bb:cc:dd:ee:01  addresses=['192.168.1.10/24']  mtu=1500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Bridges</text:p>
          </table:table-cell>
          <table:table-cell table:style-name="ce_auto" office:value-type="string" fo:wrap-option="wrap">
            <text:p>vmbr0: ports=['enp2s0']  addresses=['192.168.1.10/24']  vlan_aware=False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VLANs</text:p>
          </table:table-cell>
          <table:table-cell table:style-name="ce_auto" office:value-type="string" fo:wrap-option="wrap">
            <text:p>(none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efault Gateway</text:p>
          </table:table-cell>
          <table:table-cell table:style-name="ce_auto" office:value-type="string" fo:wrap-option="wrap">
            <text:p>192.168.1.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NS Servers</text:p>
          </table:table-cell>
          <table:table-cell table:style-name="ce_auto" office:value-type="string" fo:wrap-option="wrap">
            <text:p>1.1.1.1, 8.8.8.8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Virtual Machines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VMs</text:p>
          </table:table-cell>
          <table:table-cell table:style-name="ce_auto" office:value-type="string" fo:wrap-option="wrap">
            <text:p>(no existing VMs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0 VM(s)</text:p>
          </table:table-cell>
        </table:table-row>
        <table:table-row table:style-name="ro_normal">
          <table:table-cell table:style-name="ce_label" office:value-type="string">
            <text:p>Containers</text:p>
          </table:table-cell>
          <table:table-cell table:style-name="ce_auto" office:value-type="string" fo:wrap-option="wrap">
            <text:p>(no existing containers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0 container(s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Software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Automation Tools</text:p>
          </table:table-cell>
          <table:table-cell table:style-name="ce_auto" office:value-type="string" fo:wrap-option="wrap">
            <text:p>git: YES
python3: YES
ansible: no
terraform: no
curl: YES
wget: YES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utomation Readiness</text:p>
          </table:table-cell>
          <table:table-cell table:style-name="ce_derived" office:value-type="string" fo:wrap-option="wrap">
            <text:p>Partial (2 tools missing)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Present: git, python3, curl, wget. Missing: ansible, terraform.  ⚠ 'ansible' not detected — will need to be installed during bootstrap.; 'terraform' not detected — will need to be installed during bootstrap.</text:p>
          </table:table-cell>
        </table:table-row>
        <table:table-row table:style-name="ro_normal">
          <table:table-cell table:style-name="ce_label" office:value-type="string">
            <text:p>Running Services</text:p>
          </table:table-cell>
          <table:table-cell table:style-name="ce_auto" office:value-type="string" fo:wrap-option="wrap">
            <text:p>pveproxy, pvedaemon, pvestatd, pvescheduler, corosync, ssh, networking, cron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Assessment Gaps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Collection Errors</text:p>
          </table:table-cell>
          <table:table-cell table:style-name="ce_auto" office:value-type="string" fo:wrap-option="wrap">
            <text:p>(none)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Collection Warnings</text:p>
          </table:table-cell>
          <table:table-cell table:style-name="ce_auto" office:value-type="string" fo:wrap-option="wrap">
            <text:p>[software] dmidecode returned partial output; hardware serial number not captured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>1 warning(s)</text:p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CLASS LEGEND:</text:p>
          </table:table-cell>
          <table:table-cell table:style-name="ce_note" office:value-type="string">
            <text:p>[AUTO] From assessment  [DERIVED] Computed  [HUMAN] Operator input  [UNRESOLVED] Missing — see note</text:p>
          </table:table-cell>
          <table:table-cell table:style-name="Default" office:value-type="string">
            <text:p/>
          </table:table-cell>
          <table:table-cell table:style-name="Default" office:value-type="string">
            <text:p/>
          </table:table-cell>
        </table:table-row>
      </table:table>
      <table:table table:name="Stage 03 — Infra Bootstrap VM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Stage 03 — Infra Bootstrap VM Configuration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Field</text:p>
          </table:table-cell>
          <table:table-cell table:style-name="ce_label" office:value-type="string">
            <text:p>Value</text:p>
          </table:table-cell>
          <table:table-cell table:style-name="ce_label" office:value-type="string">
            <text:p>Class</text:p>
          </table:table-cell>
          <table:table-cell table:style-name="ce_label" office:value-type="string">
            <text:p>Note / Rationale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VM Configuration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VM ID</text:p>
          </table:table-cell>
          <table:table-cell table:style-name="ce_derived" office:value-type="string" fo:wrap-option="wrap">
            <text:p>100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No existing VMs or containers. Starting at VM ID 100 (Proxmox convention).</text:p>
          </table:table-cell>
        </table:table-row>
        <table:table-row table:style-name="ro_normal">
          <table:table-cell table:style-name="ce_label" office:value-type="string">
            <text:p>RAM Allocation</text:p>
          </table:table-cell>
          <table:table-cell table:style-name="ce_derived" office:value-type="string" fo:wrap-option="wrap">
            <text:p>8 GB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Host has 64 GB RAM. 8 GB allocated (standard allocation).</text:p>
          </table:table-cell>
        </table:table-row>
        <table:table-row table:style-name="ro_normal">
          <table:table-cell table:style-name="ce_label" office:value-type="string">
            <text:p>vCPU Count</text:p>
          </table:table-cell>
          <table:table-cell table:style-name="ce_derived" office:value-type="string" fo:wrap-option="wrap">
            <text:p>4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Host has 48 logical CPUs. 4 vCPUs allocated for infra-bootstrap VM.</text:p>
          </table:table-cell>
        </table:table-row>
        <table:table-row table:style-name="ro_normal">
          <table:table-cell table:style-name="ce_label" office:value-type="string">
            <text:p>Boot Disk Size</text:p>
          </table:table-cell>
          <table:table-cell table:style-name="ce_derived" office:value-type="string" fo:wrap-option="wrap">
            <text:p>64 GB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64 GB disk recommended (pool: rpool, 810 GB free).</text:p>
          </table:table-cell>
        </table:table-row>
        <table:table-row table:style-name="ro_normal">
          <table:table-cell table:style-name="ce_label" office:value-type="string">
            <text:p>Storage Pool</text:p>
          </table:table-cell>
          <table:table-cell table:style-name="ce_derived" office:value-type="string" fo:wrap-option="wrap">
            <text:p>rpool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Pool 'rpool' has the most free space (810 GB free, topology: mirror).</text:p>
          </table:table-cell>
        </table:table-row>
        <table:table-row table:style-name="ro_normal">
          <table:table-cell table:style-name="ce_label" office:value-type="string">
            <text:p>Network Bridge</text:p>
          </table:table-cell>
          <table:table-cell table:style-name="ce_derived" office:value-type="string" fo:wrap-option="wrap">
            <text:p>vmbr1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vmbr0 is already in use. Recommend vmbr1 as the next available bridge name.</text:p>
          </table:table-cell>
        </table:table-row>
        <table:table-row table:style-name="ro_normal">
          <table:table-cell table:style-name="ce_label" office:value-type="string">
            <text:p>VM IP Address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Enter static IP. Suggested range: 192.168.1.20–192.168.1.30/24</text:p>
          </table:table-cell>
        </table:table-row>
        <table:table-row table:style-name="ro_normal">
          <table:table-cell table:style-name="ce_label" office:value-type="string">
            <text:p>VM Name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Enter VM name (default: infra-bootstrap)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OS Configuration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Ubuntu ISO path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Path to ISO in Proxmox storage, e.g. local:iso/ubuntu-22.04-live-server-amd64.iso</text:p>
          </table:table-cell>
        </table:table-row>
        <table:table-row table:style-name="ro_normal">
          <table:table-cell table:style-name="ce_label" office:value-type="string">
            <text:p>OS username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Initial OS username (e.g. ubuntu)</text:p>
          </table:table-cell>
        </table:table-row>
        <table:table-row table:style-name="ro_normal">
          <table:table-cell table:style-name="ce_label" office:value-type="string">
            <text:p>VM password — KeePass path</text:p>
          </table:table-cell>
          <table:table-cell table:style-name="ce_human" office:value-type="string">
            <text:p>☐  (enter valu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Enter KeePass path for VM password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Bootstrap VM ID Sequence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VM IDs for Stages 03–12</text:p>
          </table:table-cell>
          <table:table-cell table:style-name="ce_derived" office:value-type="string" fo:wrap-option="wrap">
            <text:p>100, 101, 102, 103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Next 4 available VM IDs: [100, 101, 102, 103]. No existing IDs in use.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Create VM Command (Auto-generated)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qm create command</text:p>
          </table:table-cell>
          <table:table-cell table:style-name="ce_derived" office:value-type="string" fo:wrap-option="wrap">
            <text:p>qm create 100 \
  --name infra-bootstrap \
  --memory 8192 \
  --cores 4 \
  --net0 virtio,bridge=vmbr1 \
  --scsi0 rpool:64 \
  --ostype l26 --serial0 socket --vga serial0</text:p>
          </table:table-cell>
          <table:table-cell table:style-name="ce_label" office:value-type="string">
            <text:p>[DERIVED]</text:p>
          </table:table-cell>
          <table:table-cell table:style-name="ce_note" office:value-type="string" fo:wrap-option="wrap">
            <text:p>Parameters derived from assessment. Replace [VM_IP] in cloud-init after creation.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Validation Checkpoints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VM created in Proxmox web UI</text:p>
          </table:table-cell>
          <table:table-cell table:style-name="ce_human" office:value-type="string">
            <text:p>☐  (check when complet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Verify VM appears with correct ID and name</text:p>
          </table:table-cell>
        </table:table-row>
        <table:table-row table:style-name="ro_normal">
          <table:table-cell table:style-name="ce_label" office:value-type="string">
            <text:p>VM boots to OS</text:p>
          </table:table-cell>
          <table:table-cell table:style-name="ce_human" office:value-type="string">
            <text:p>☐  (check when complet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Start VM and confirm OS boot completes</text:p>
          </table:table-cell>
        </table:table-row>
        <table:table-row table:style-name="ro_normal">
          <table:table-cell table:style-name="ce_label" office:value-type="string">
            <text:p>SSH access confirmed</text:p>
          </table:table-cell>
          <table:table-cell table:style-name="ce_human" office:value-type="string">
            <text:p>☐  (check when complet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ssh ubuntu@[VM_IP] — verify login</text:p>
          </table:table-cell>
        </table:table-row>
        <table:table-row table:style-name="ro_normal">
          <table:table-cell table:style-name="ce_label" office:value-type="string">
            <text:p>Internet access from VM</text:p>
          </table:table-cell>
          <table:table-cell table:style-name="ce_human" office:value-type="string">
            <text:p>☐  (check when complete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From VM: ping 1.1.1.1 — verify response</text:p>
          </table:table-cell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CLASS LEGEND:</text:p>
          </table:table-cell>
          <table:table-cell table:style-name="ce_note" office:value-type="string">
            <text:p>[AUTO] From assessment  [DERIVED] Computed  [HUMAN] Operator input  [UNRESOLVED] Missing — see note</text:p>
          </table:table-cell>
          <table:table-cell table:style-name="Default" office:value-type="string">
            <text:p/>
          </table:table-cell>
          <table:table-cell table:style-name="Default" office:value-type="string">
            <text:p/>
          </table:table-cell>
        </table:table-row>
      </table:table>
      <table:table table:name="Generation Report">
        <table:table-column table:style-name="co_label"/>
        <table:table-column table:style-name="co_value"/>
        <table:table-column table:style-name="co_class"/>
        <table:table-column table:style-name="co_note"/>
        <table:table-row table:style-name="ro_normal">
          <table:table-cell table:style-name="ce_title" office:value-type="string">
            <text:p>Documentation Generation Report</text:p>
          </table:table-cell>
          <table:table-cell table:number-columns-repeated="3"/>
        </table:table-row>
        <table:table-row table:style-name="ro_normal">
          <table:table-cell table:number-columns-repeated="4"/>
        </table:table-row>
        <table:table-row table:style-name="ro_normal">
          <table:table-cell table:style-name="ce_label" office:value-type="string">
            <text:p>Field</text:p>
          </table:table-cell>
          <table:table-cell table:style-name="ce_label" office:value-type="string">
            <text:p>Value</text:p>
          </table:table-cell>
          <table:table-cell table:style-name="ce_label" office:value-type="string">
            <text:p>Class</text:p>
          </table:table-cell>
          <table:table-cell table:style-name="ce_label" office:value-type="string">
            <text:p>Note / Rationale</text:p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Generation Metadata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Generated At</text:p>
          </table:table-cell>
          <table:table-cell table:style-name="ce_auto" office:value-type="string" fo:wrap-option="wrap">
            <text:p>2026-05-31T03:00:14Z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ssessment Tier</text:p>
          </table:table-cell>
          <table:table-cell table:style-name="ce_auto" office:value-type="string" fo:wrap-option="wrap">
            <text:p>1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Assessment Date</text:p>
          </table:table-cell>
          <table:table-cell table:style-name="ce_auto" office:value-type="string" fo:wrap-option="wrap">
            <text:p>2026-05-30T14:23:00Z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Template Version</text:p>
          </table:table-cell>
          <table:table-cell table:style-name="ce_auto" office:value-type="string" fo:wrap-option="wrap">
            <text:p>bootstrap-v1.0</text:p>
          </table:table-cell>
          <table:table-cell table:style-name="ce_label" office:value-type="string">
            <text:p>[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Field Summary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AUTO</text:p>
          </table:table-cell>
          <table:table-cell table:style-name="Default" office:value-type="string" fo:wrap-option="wrap">
            <text:p>18 fields (50%)</text:p>
          </table:table-cell>
          <table:table-cell table:style-name="ce_label" office:value-type="string">
            <text:p>[ce_auto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DERIVED</text:p>
          </table:table-cell>
          <table:table-cell table:style-name="Default" office:value-type="string" fo:wrap-option="wrap">
            <text:p>11 fields (30%)</text:p>
          </table:table-cell>
          <table:table-cell table:style-name="ce_label" office:value-type="string">
            <text:p>[ce_deri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HUMAN</text:p>
          </table:table-cell>
          <table:table-cell table:style-name="Default" office:value-type="string" fo:wrap-option="wrap">
            <text:p>7 fields (19%)</text:p>
          </table:table-cell>
          <table:table-cell table:style-name="ce_label" office:value-type="string">
            <text:p>[ce_human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style-name="ce_label" office:value-type="string">
            <text:p>UNRESOLVED</text:p>
          </table:table-cell>
          <table:table-cell table:style-name="Default" office:value-type="string" fo:wrap-option="wrap">
            <text:p>0 fields (0%)</text:p>
          </table:table-cell>
          <table:table-cell table:style-name="ce_label" office:value-type="string">
            <text:p>[ce_unresolved]</text:p>
          </table:table-cell>
          <table:table-cell table:style-name="ce_note" office:value-type="string" fo:wrap-option="wrap">
            <text:p/>
          </table:table-cell>
        </table:table-row>
        <table:table-row table:style-name="ro_normal">
          <table:table-cell table:number-columns-repeated="4"/>
        </table:table-row>
        <table:table-row table:style-name="ro_section">
          <table:table-cell table:style-name="ce_section" office:value-type="string">
            <text:p>  Human Input Required</text:p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  <table:table-cell table:style-name="ce_section" office:value-type="string">
            <text:p/>
          </table:table-cell>
        </table:table-row>
        <table:table-row table:style-name="ro_normal">
          <table:table-cell table:style-name="ce_label" office:value-type="string">
            <text:p>human.root_password_location</text:p>
          </table:table-cell>
          <table:table-cell table:style-name="ce_human" office:value-type="string" fo:wrap-option="wrap">
            <text:p>(blank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Enter KeePass path for root password, e.g. Infrastructure/proxmox/pve01-root</text:p>
          </table:table-cell>
        </table:table-row>
        <table:table-row table:style-name="ro_normal">
          <table:table-cell table:style-name="ce_label" office:value-type="string">
            <text:p>human.recovery_passphrase</text:p>
          </table:table-cell>
          <table:table-cell table:style-name="ce_human" office:value-type="string" fo:wrap-option="wrap">
            <text:p>(blank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Enter KeePass path for disk encryption passphrase (if applicable)</text:p>
          </table:table-cell>
        </table:table-row>
        <table:table-row table:style-name="ro_normal">
          <table:table-cell table:style-name="ce_label" office:value-type="string">
            <text:p>human.vm_ip_address</text:p>
          </table:table-cell>
          <table:table-cell table:style-name="ce_human" office:value-type="string" fo:wrap-option="wrap">
            <text:p>(blank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Enter static IP for infra-bootstrap VM. Suggested: 192.168.1.20–192.168.1.30/24</text:p>
          </table:table-cell>
        </table:table-row>
        <table:table-row table:style-name="ro_normal">
          <table:table-cell table:style-name="ce_label" office:value-type="string">
            <text:p>human.vm_name</text:p>
          </table:table-cell>
          <table:table-cell table:style-name="ce_human" office:value-type="string" fo:wrap-option="wrap">
            <text:p>(blank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Enter VM name (recommended: infra-bootstrap)</text:p>
          </table:table-cell>
        </table:table-row>
        <table:table-row table:style-name="ro_normal">
          <table:table-cell table:style-name="ce_label" office:value-type="string">
            <text:p>human.vm_username</text:p>
          </table:table-cell>
          <table:table-cell table:style-name="ce_human" office:value-type="string" fo:wrap-option="wrap">
            <text:p>(blank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Enter OS username (recommended: ubuntu)</text:p>
          </table:table-cell>
        </table:table-row>
        <table:table-row table:style-name="ro_normal">
          <table:table-cell table:style-name="ce_label" office:value-type="string">
            <text:p>human.vm_password_location</text:p>
          </table:table-cell>
          <table:table-cell table:style-name="ce_human" office:value-type="string" fo:wrap-option="wrap">
            <text:p>(blank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Enter KeePass path for VM password</text:p>
          </table:table-cell>
        </table:table-row>
        <table:table-row table:style-name="ro_normal">
          <table:table-cell table:style-name="ce_label" office:value-type="string">
            <text:p>human.iso_location</text:p>
          </table:table-cell>
          <table:table-cell table:style-name="ce_human" office:value-type="string" fo:wrap-option="wrap">
            <text:p>(blank)</text:p>
          </table:table-cell>
          <table:table-cell table:style-name="ce_label" office:value-type="string">
            <text:p>[HUMAN]</text:p>
          </table:table-cell>
          <table:table-cell table:style-name="ce_note" office:value-type="string" fo:wrap-option="wrap">
            <text:p>Enter ISO path in Proxmox, e.g. local:iso/ubuntu-22.04-live-server-amd64.is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able="urn:oasis:names:tc:opendocument:xmlns:table:1.0" office:version="1.2">
  <office:styles>
    <style:style style:name="Default" style:family="table-cell">
      <style:text-properties fo:font-size="10pt"/>
    </style:style>
  </office:styles>
  <office:automatic-styles/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Assessment Engine doc-gen v1.0</meta:generator>
  </office:meta>
</office:document-meta>
</file>