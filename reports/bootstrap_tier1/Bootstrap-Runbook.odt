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/>
  <office:body>
    <office:text>
      <text:p text:style-name="Heading1">Bootstrap Runbook</text:p>
      <text:p text:style-name="BodyText">Host: pve01  |  Proxmox 8.2-1  |  Assessment: 2026-05-30T14:23:00Z</text:p>
      <text:p text:style-name="BodyText">Generated by Assessment Engine doc-gen. Fields are classified: [AUTO] from assessment  [DERIVED] computed  [HUMAN] operator input required  [UNRESOLVED] data unavailable.</text:p>
      <text:p text:style-name="BodyText"/>
      <text:p text:style-name="BodyText">Methodology: Observe → Decide → Act → Record → Validate</text:p>
      <text:p text:style-name="BodyText"/>
      <text:p text:style-name="Heading1">Stage 01 — Proxmox Host Preparation</text:p>
      <text:p text:style-name="BodyText">Purpose: Configure the freshly installed Proxmox host — storage, networking, and base system settings — to a known-good state ready for VM deployment.</text:p>
      <text:p text:style-name="BodyText"/>
      <text:p text:style-name="Heading2">Observed State</text:p>
      <text:p text:style-name="FieldAuto">[AUTO]  Hostname: pve01</text:p>
      <text:p text:style-name="FieldAuto">[AUTO]  Proxmox Version: 8.2-1</text:p>
      <text:p text:style-name="FieldAuto">[AUTO]  Kernel: 6.8.4-2-pve</text:p>
      <text:p text:style-name="FieldAuto">[AUTO]  CPU: Intel(R) Core(TM) i9-13900K  (48 logical CPUs)</text:p>
      <text:p text:style-name="FieldAuto">[AUTO]  RAM: 64 GB total</text:p>
      <text:p text:style-name="FieldAuto">[AUTO]  Block Devices: sda: 931.5 GB  Samsung SSD 870 EVO 1TB  rotational=False</text:p>
      <text:p text:style-name="FieldAuto">sdb: 931.5 GB  Samsung SSD 870 EVO 1TB  rotational=False</text:p>
      <text:p text:style-name="FieldAuto">[AUTO]  Network: Gateway: 192.168.1.1  DNS: 1.1.1.1, 8.8.8.8</text:p>
      <text:p text:style-name="BodyText"/>
      <text:p text:style-name="Heading2">Decisions</text:p>
      <text:p text:style-name="FieldDerived">[DERIVED]  ZFS Topology: mirror</text:p>
      <text:p text:style-name="Note">       ↳ Two SSDs detected (sda, sdb). ZFS mirror recommended: full redundancy, no write penalty vs. single device.  ⚠ Existing ZFS pool(s) detected: rpool. Verify topology matches recommendation before proceeding.</text:p>
      <text:p text:style-name="FieldDerived">[DERIVED]  Pool Name: rpool</text:p>
      <text:p text:style-name="Note">       ↳ Pool 'rpool' has the most free space (810 GB free, topology: mirror).</text:p>
      <text:p text:style-name="FieldUnresolved">[UNRESOLVED]  VM Bridge: (not available)</text:p>
      <text:p text:style-name="FieldDerived">[DERIVED]  VM IP Range: 192.168.1.20–192.168.1.30/24</text:p>
      <text:p text:style-name="Note">       ↳ Host IP is 192.168.1.10/24. Suggested VM range: 192.168.1.20–192.168.1.30/24 (same subnet, avoids host address).</text:p>
      <text:p text:style-name="FieldUnresolved">⚠  Existing ZFS pool(s) detected: rpool. Verify topology matches recommendation before proceeding.</text:p>
      <text:p text:style-name="BodyText"/>
      <text:p text:style-name="Heading2">Step 1.1 — Verify SSH Access</text:p>
      <text:p text:style-name="Code">ssh root@pve01</text:p>
      <text:p text:style-name="BodyText">Expected: login succeeds, Proxmox welcome banner displayed.</text:p>
      <text:p text:style-name="Checkbox">☐  SSH access confirmed</text:p>
      <text:p text:style-name="BodyText"/>
      <text:p text:style-name="Heading2">Step 1.2 — Verify ZFS Pool</text:p>
      <text:p text:style-name="Code">zpool status</text:p>
      <text:p text:style-name="FieldDerived">[DERIVED]  Expected pool name: rpool</text:p>
      <text:p text:style-name="FieldDerived">[DERIVED]  Expected topology: mirror</text:p>
      <text:p text:style-name="BodyText">Expected: pool state ONLINE, no errors.</text:p>
      <text:p text:style-name="Checkbox">☐  ZFS pool healthy and ONLINE</text:p>
      <text:p text:style-name="BodyText"/>
      <text:p text:style-name="Heading2">Step 1.3 — Verify Network Configuration</text:p>
      <text:p text:style-name="Code">ip addr show</text:p>
      <text:p text:style-name="Code">ip route show</text:p>
      <text:p text:style-name="FieldUnresolved">[UNRESOLVED]  Expected bridge: (not available)</text:p>
      <text:p text:style-name="FieldAuto">[AUTO]  Expected gateway: 192.168.1.1</text:p>
      <text:p text:style-name="Checkbox">☐  Network configuration matches expected state</text:p>
      <text:p text:style-name="BodyText"/>
      <text:p text:style-name="Heading2">Step 1.4 — Record Credentials</text:p>
      <text:p text:style-name="FieldHuman">[HUMAN]  Root password — KeePass path: [HUMAN INPUT REQUIRED]</text:p>
      <text:p text:style-name="Note">       ↳ Record root password in KeePass before proceeding</text:p>
      <text:p text:style-name="Checkbox">☐  Root password recorded in KeePass</text:p>
      <text:p text:style-name="BodyText"/>
      <text:p text:style-name="Heading2">Step 1.5 — Verify Proxmox Web UI</text:p>
      <text:p text:style-name="Code">https://pve01:8006</text:p>
      <text:p text:style-name="BodyText">Expected: login page loads, authentication succeeds.</text:p>
      <text:p text:style-name="Checkbox">☐  Proxmox web UI accessible and login confirmed</text:p>
      <text:p text:style-name="BodyText"/>
      <text:p text:style-name="Heading2">Recovery: Stage 01 Failures</text:p>
      <text:p text:style-name="BodyText">SSH not accessible: verify host IP, check /etc/network/interfaces, restart networking.</text:p>
      <text:p text:style-name="BodyText">ZFS pool degraded: run 'zpool status' for detail, do not proceed until ONLINE.</text:p>
      <text:p text:style-name="BodyText">Web UI not accessible: check pveproxy service — 'systemctl status pveproxy'.</text:p>
      <text:p text:style-name="BodyText"/>
      <text:p text:style-name="Heading1">Stage 02 — Host Assessment</text:p>
      <text:p text:style-name="BodyText">Purpose: Capture complete observed state of the host into the assessment record. This is the baseline from which all documentation is generated.</text:p>
      <text:p text:style-name="BodyText"/>
      <text:p text:style-name="Heading2">Observed State — Complete Inventory</text:p>
      <text:p text:style-name="Heading3">CPU</text:p>
      <text:p text:style-name="FieldAuto">[AUTO]  Model: Intel(R) Core(TM) i9-13900K</text:p>
      <text:p text:style-name="FieldAuto">[AUTO]  Architecture: x86_64</text:p>
      <text:p text:style-name="FieldAuto">[AUTO]  Logical CPUs: 48</text:p>
      <text:p text:style-name="FieldAuto">[AUTO]  Virtualization: VT-x</text:p>
      <text:p text:style-name="Heading3">Memory</text:p>
      <text:p text:style-name="FieldAuto">[AUTO]  Total: 64 GB</text:p>
      <text:p text:style-name="FieldAuto">[AUTO]  Available: 61.2 GB</text:p>
      <text:p text:style-name="Heading3">Storage</text:p>
      <text:p text:style-name="FieldAuto">[AUTO]  Block Devices: sda: 931.5 GB  Samsung SSD 870 EVO 1TB  rotational=False</text:p>
      <text:p text:style-name="FieldAuto">sdb: 931.5 GB  Samsung SSD 870 EVO 1TB  rotational=False</text:p>
      <text:p text:style-name="Note">       ↳ 2 device(s)</text:p>
      <text:p text:style-name="FieldAuto">[AUTO]  ZFS Pools: rpool: ONLINE  topology=mirror  free=810.1 GB</text:p>
      <text:p text:style-name="Heading3">Network</text:p>
      <text:p text:style-name="FieldAuto">[AUTO]  Interfaces: lo: UNKNOWN  ['127.0.0.1/8', '::1/128']</text:p>
      <text:p text:style-name="FieldAuto">enp2s0: UP  []</text:p>
      <text:p text:style-name="FieldAuto">vmbr0: UP  ['192.168.1.10/24']</text:p>
      <text:p text:style-name="FieldAuto">[AUTO]  Bridges: vmbr0: ports=['enp2s0']  ['192.168.1.10/24']</text:p>
      <text:p text:style-name="Heading3">Existing VMs and Containers</text:p>
      <text:p text:style-name="FieldAuto">[AUTO]  VMs: (none)</text:p>
      <text:p text:style-name="Note">       ↳ 0 VM(s)</text:p>
      <text:p text:style-name="FieldAuto">[AUTO]  Containers: (none)</text:p>
      <text:p text:style-name="Note">       ↳ 0 container(s)</text:p>
      <text:p text:style-name="Heading3">Software</text:p>
      <text:p text:style-name="FieldAuto">[AUTO]  Automation Tools: git=✓  python3=✓  ansible=✗  terraform=✗  curl=✓  wget=✓</text:p>
      <text:p text:style-name="Heading2">Step 2.1 — Run Bootstrap Assessment</text:p>
      <text:p text:style-name="BodyText">If not already done, run the Tier 1 assessment to capture fresh state:</text:p>
      <text:p text:style-name="Code">./bootstrap.sh</text:p>
      <text:p text:style-name="BodyText">Transfer the resulting archive to your management workstation.</text:p>
      <text:p text:style-name="Checkbox">☐  Assessment archive transferred to workstation</text:p>
      <text:p text:style-name="Heading2">Step 2.2 — Verify Assessment Completeness</text:p>
      <text:p text:style-name="BodyText">No collection errors detected.</text:p>
      <text:p text:style-name="Checkbox">☐  Assessment gaps reviewed and understood</text:p>
      <text:p text:style-name="BodyText"/>
      <text:p text:style-name="Heading1">Stage 03 — Infra Bootstrap VM</text:p>
      <text:p text:style-name="BodyText">Purpose: Create the infra-bootstrap VM. This VM is the control node from which Ansible, OpenTofu, and the full automation platform will be deployed in later stages.</text:p>
      <text:p text:style-name="BodyText"/>
      <text:p text:style-name="Heading2">Decisions</text:p>
      <text:p text:style-name="FieldDerived">[DERIVED]  VM ID: 100</text:p>
      <text:p text:style-name="Note">       ↳ No existing VMs or containers. Starting at VM ID 100 (Proxmox convention).</text:p>
      <text:p text:style-name="FieldDerived">[DERIVED]  RAM: 8 GB</text:p>
      <text:p text:style-name="Note">       ↳ Host has 64 GB RAM. 8 GB allocated (standard allocation).</text:p>
      <text:p text:style-name="FieldDerived">[DERIVED]  vCPUs: 4</text:p>
      <text:p text:style-name="Note">       ↳ Host has 48 logical CPUs. 4 vCPUs allocated for infra-bootstrap VM.</text:p>
      <text:p text:style-name="FieldDerived">[DERIVED]  Disk: 64 GB</text:p>
      <text:p text:style-name="Note">       ↳ 64 GB disk recommended (pool: rpool, 810 GB free).</text:p>
      <text:p text:style-name="FieldDerived">[DERIVED]  Storage Pool: rpool</text:p>
      <text:p text:style-name="Note">       ↳ Pool 'rpool' has the most free space (810 GB free, topology: mirror).</text:p>
      <text:p text:style-name="FieldDerived">[DERIVED]  Network Bridge: vmbr1</text:p>
      <text:p text:style-name="Note">       ↳ vmbr0 is already in use. Recommend vmbr1 as the next available bridge name.</text:p>
      <text:p text:style-name="FieldHuman">[HUMAN]  VM IP Address: [HUMAN INPUT REQUIRED]</text:p>
      <text:p text:style-name="Note">       ↳ Suggested range: 192.168.1.20–192.168.1.30/24</text:p>
      <text:p text:style-name="FieldDerived">[DERIVED]  VM ID Sequence: 100, 101, 102, 103</text:p>
      <text:p text:style-name="Note">       ↳ Next 4 available VM IDs: [100, 101, 102, 103]. No existing IDs in use.</text:p>
      <text:p text:style-name="BodyText"/>
      <text:p text:style-name="Heading2">Step 3.1 — Download Ubuntu ISO (if not present)</text:p>
      <text:p text:style-name="Code"># On the Proxmox host:</text:p>
      <text:p text:style-name="Code">wget -P /var/lib/vz/template/iso/ \</text:p>
      <text:p text:style-name="Code">  https://releases.ubuntu.com/22.04/ubuntu-22.04.4-live-server-amd64.iso</text:p>
      <text:p text:style-name="Checkbox">☐  Ubuntu ISO available in Proxmox local storage</text:p>
      <text:p text:style-name="BodyText"/>
      <text:p text:style-name="Heading2">Step 3.2 — Create VM</text:p>
      <text:p text:style-name="BodyText">Run the following on the Proxmox host. Replace [VM_IP] and [CIDR_PREFIX] with values from the Decisions section above.</text:p>
      <text:p text:style-name="Code">qm create 100 \</text:p>
      <text:p text:style-name="Code">  --name infra-bootstrap \</text:p>
      <text:p text:style-name="Code">  --memory 8192 \</text:p>
      <text:p text:style-name="Code">  --cores 4 \</text:p>
      <text:p text:style-name="Code">  --net0 virtio,bridge=vmbr1 \</text:p>
      <text:p text:style-name="Code">  --scsi0 rpool:64 \</text:p>
      <text:p text:style-name="Code">  --ide2 local:iso/ubuntu-22.04.4-live-server-amd64.iso,media=cdrom \</text:p>
      <text:p text:style-name="Code">  --boot order=ide2 \</text:p>
      <text:p text:style-name="Code">  --ostype l26 --serial0 socket --vga serial0</text:p>
      <text:p text:style-name="Checkbox">☐  VM 100 (infra-bootstrap) created</text:p>
      <text:p text:style-name="BodyText"/>
      <text:p text:style-name="Heading2">Step 3.3 — Configure Cloud-Init (Optional)</text:p>
      <text:p text:style-name="BodyText">If using cloud-init for automated Ubuntu setup:</text:p>
      <text:p text:style-name="Code">qm set 100 --ciuser ubuntu --cipassword $(openssl passwd -6 'REPLACE_ME')</text:p>
      <text:p text:style-name="Code">qm set 100 --ipconfig0 ip=[VM_IP]/24,gw=192.168.1.1</text:p>
      <text:p text:style-name="Code">qm set 100 --nameserver 1.1.1.1, 8.8.8.8</text:p>
      <text:p text:style-name="Code">qm set 100 --sshkeys ~/.ssh/authorized_keys</text:p>
      <text:p text:style-name="Checkbox">☐  Cloud-init configured (or manual install selected)</text:p>
      <text:p text:style-name="BodyText"/>
      <text:p text:style-name="Heading2">Step 3.4 — Start VM and Install OS</text:p>
      <text:p text:style-name="Code">qm start 100</text:p>
      <text:p text:style-name="BodyText">Monitor installation via Proxmox web UI → VM 100 → Console.</text:p>
      <text:p text:style-name="BodyText">Complete Ubuntu installation. Set hostname, username, SSH key.</text:p>
      <text:p text:style-name="FieldHuman">[HUMAN]  Recommended username: ubuntu</text:p>
      <text:p text:style-name="Note">       ↳ Or enter your preferred username above</text:p>
      <text:p text:style-name="Checkbox">☐  Ubuntu installation complete</text:p>
      <text:p text:style-name="BodyText"/>
      <text:p text:style-name="Heading2">Step 3.5 — Verify VM</text:p>
      <text:p text:style-name="Code">ssh ubuntu@[VM_IP]</text:p>
      <text:p text:style-name="BodyText">Expected: login succeeds.</text:p>
      <text:p text:style-name="Code">ping -c 3 1.1.1.1</text:p>
      <text:p text:style-name="BodyText">Expected: 3 packets transmitted, 3 received.</text:p>
      <text:p text:style-name="Code">sudo apt update</text:p>
      <text:p text:style-name="BodyText">Expected: package lists updated without errors.</text:p>
      <text:p text:style-name="Checkbox">☐  SSH access to VM confirmed</text:p>
      <text:p text:style-name="Checkbox">☐  Internet access from VM confirmed</text:p>
      <text:p text:style-name="Checkbox">☐  Package manager works (apt update succeeds)</text:p>
      <text:p text:style-name="BodyText"/>
      <text:p text:style-name="Heading2">Recovery: Stage 03 Failures</text:p>
      <text:p text:style-name="BodyText">VM won't start: check 'qm status 100', review Proxmox task log.</text:p>
      <text:p text:style-name="BodyText">Network not reachable: verify bridge configuration, check IP assignment.</text:p>
      <text:p text:style-name="BodyText">ISO not found: verify ISO path — 'ls /var/lib/vz/template/iso/'.</text:p>
      <text:p text:style-name="BodyText"/>
      <text:p text:style-name="Heading1">Appendix — Assessment Data</text:p>
      <text:p text:style-name="BodyText">Assessment collected: 2026-05-30T14:23:00Z</text:p>
      <text:p text:style-name="BodyText">Host: pve01 (pve01.internal)</text:p>
      <text:p text:style-name="BodyText">Proxmox: 8.2-1</text:p>
      <text:p text:style-name="BodyText"/>
      <text:p text:style-name="BodyText">Field classification legend:</text:p>
      <text:p text:style-name="BodyText">  [AUTO]       — Populated directly from assessment data</text:p>
      <text:p text:style-name="BodyText">  [DERIVED]    — Computed by analysis module from assessment data</text:p>
      <text:p text:style-name="BodyText">  [HUMAN]      — Operator must provide; cannot be discovered automatically</text:p>
      <text:p text:style-name="BodyText">  [UNRESOLVED] — Expected data was unavailable during collection</text:p>
      <text:p text:style-name="BodyText"/>
      <text:p text:style-name="BodyText">No unresolved fiel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 style:class="text">
      <style:paragraph-properties fo:margin-bottom="0.2cm"/>
      <style:text-properties fo:font-size="10pt" fo:font-family="Liberation Sans"/>
    </style:style>
    <style:style style:name="Heading1" style:family="paragraph" style:parent-style-name="Standard">
      <style:paragraph-properties fo:margin-top="0.5cm" fo:margin-bottom="0.3cm" fo:keep-with-next="always"/>
      <style:text-properties fo:font-size="16pt" fo:font-weight="bold" fo:color="#1F3864"/>
    </style:style>
    <style:style style:name="Heading2" style:family="paragraph" style:parent-style-name="Standard">
      <style:paragraph-properties fo:margin-top="0.4cm" fo:margin-bottom="0.2cm" fo:keep-with-next="always" fo:background-color="#D6E4F0"/>
      <style:text-properties fo:font-size="13pt" fo:font-weight="bold" fo:color="#1F3864"/>
    </style:style>
    <style:style style:name="Heading3" style:family="paragraph" style:parent-style-name="Standard">
      <style:paragraph-properties fo:margin-top="0.3cm" fo:margin-bottom="0.1cm"/>
      <style:text-properties fo:font-size="11pt" fo:font-weight="bold" fo:color="#1A5276"/>
    </style:style>
    <style:style style:name="BodyText" style:family="paragraph" style:parent-style-name="Standard">
      <style:paragraph-properties fo:margin-bottom="0.15cm"/>
      <style:text-properties fo:font-size="10pt"/>
    </style:style>
    <style:style style:name="Code" style:family="paragraph" style:parent-style-name="Standard">
      <style:paragraph-properties fo:margin-left="0.5cm" fo:margin-bottom="0.1cm" fo:background-color="#F2F3F4" fo:padding="0.1cm"/>
      <style:text-properties fo:font-size="9pt" fo:font-family="Liberation Mono" style:font-family-generic="modern"/>
    </style:style>
    <style:style style:name="FieldAuto" style:family="paragraph" style:parent-style-name="Standard">
      <style:paragraph-properties fo:margin-left="0.3cm" fo:background-color="#EBF5FB" fo:padding="0.05cm"/>
      <style:text-properties fo:font-size="10pt" fo:color="#1A5276"/>
    </style:style>
    <style:style style:name="FieldDerived" style:family="paragraph" style:parent-style-name="Standard">
      <style:paragraph-properties fo:margin-left="0.3cm" fo:background-color="#EAFAF1" fo:padding="0.05cm"/>
      <style:text-properties fo:font-size="10pt" fo:color="#145A32"/>
    </style:style>
    <style:style style:name="FieldHuman" style:family="paragraph" style:parent-style-name="Standard">
      <style:paragraph-properties fo:margin-left="0.3cm" fo:background-color="#FEFDE7" fo:padding="0.05cm"/>
      <style:text-properties fo:font-size="10pt" fo:color="#7D6608"/>
    </style:style>
    <style:style style:name="FieldUnresolved" style:family="paragraph" style:parent-style-name="Standard">
      <style:paragraph-properties fo:margin-left="0.3cm" fo:background-color="#FDEDEC" fo:padding="0.05cm"/>
      <style:text-properties fo:font-size="10pt" fo:color="#78281F"/>
    </style:style>
    <style:style style:name="Note" style:family="paragraph" style:parent-style-name="Standard">
      <style:paragraph-properties fo:margin-left="0.5cm"/>
      <style:text-properties fo:font-size="9pt" fo:color="#555555" fo:font-style="italic"/>
    </style:style>
    <style:style style:name="Checkbox" style:family="paragraph" style:parent-style-name="Standard">
      <style:paragraph-properties fo:margin-left="0.5cm" fo:background-color="#FFF9C4"/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Assessment Engine doc-gen v1.0</meta:generator>
  </office:meta>
</office:document-meta>
</file>